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000000350CEA31ED56D6CE7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1">
      <style:text-properties fo:font-size="14pt" style:font-size-asian="14pt" style:font-size-complex="14pt"/>
    </style:style>
    <style:style style:name="P3" style:family="paragraph" style:parent-style-name="Text_20_body" style:list-style-name="L2">
      <style:text-properties fo:font-size="14pt" style:font-size-asian="14pt" style:font-size-complex="14pt"/>
    </style:style>
    <style:style style:name="P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g Report 1 – AcademyBugs</text:p>
      <text:p text:style-name="Text_20_body"><text:span text:style-name="T2">Title</text:span><text:span text:style-name="T1">: Incorrect spacing in “Return to store” button text<text:line-break/></text:span><text:span text:style-name="T2">Website:</text:span><text:span text:style-name="T1"> </text:span><text:a xlink:type="simple" xlink:href="https://academybugs.com/" office:target-frame-name="_new" xlink:show="replace" text:style-name="Internet_20_link" text:visited-style-name="Visited_20_Internet_20_Link"><text:span text:style-name="T1">https://academybugs.com</text:span></text:a><text:span text:style-name="T1"><text:line-break/></text:span><text:span text:style-name="T2">Browser</text:span><text:span text:style-name="T1">: Chrome<text:line-break/></text:span><text:span text:style-name="T2">Device</text:span><text:span text:style-name="T1">: Desktop</text:span></text:p>
      <text:p text:style-name="P1"><text:span text:style-name="T3">Description</text:span>:<text:line-break/>The “Return to store” button contains excessive spacing before the last letter, causing visual inconsistency.</text:p>
      <text:p text:style-name="P1"><text:span text:style-name="T3">Steps to Reproduce</text:span>:</text:p>
      <text:list xml:id="list3188222326" text:style-name="L1">
        <text:list-item>
          <text:p text:style-name="P6"><text:span text:style-name="T1">Open </text:span><text:a xlink:type="simple" xlink:href="https://academybugs.com/" office:target-frame-name="_new" xlink:show="replace" text:style-name="Internet_20_link" text:visited-style-name="Visited_20_Internet_20_Link"><text:span text:style-name="T1">https://academybugs.com</text:span></text:a><text:span text:style-name="T1"> </text:span></text:p>
        </text:list-item>
        <text:list-item>
          <text:p text:style-name="P8">Click “Find Bugs” (blue icon on the right side) </text:p>
        </text:list-item>
        <text:list-item>
          <text:p text:style-name="P8">Select any product </text:p>
        </text:list-item>
        <text:list-item>
          <text:p text:style-name="P8">Open the cart (bottom right corner) </text:p>
        </text:list-item>
        <text:list-item>
          <text:p text:style-name="P2">Empty the cart </text:p>
        </text:list-item>
      </text:list>
      <text:p text:style-name="P1"><text:span text:style-name="T3">Expected Result</text:span>:<text:line-break/>The text “Return to store” is displayed with consistent spacing between all characters.</text:p>
      <text:p text:style-name="P1"><text:span text:style-name="T3">Actual Result</text:span>:<text:line-break/>There is excessive spacing before the last letter in “Return to store”.</text:p>
      <text:p text:style-name="P1"><text:span text:style-name="T3">Severity</text:span>: Low<text:line-break/><text:span text:style-name="T3">Priority</text:span>: Low</text:p>
      <text:p text:style-name="P1"><text:span text:style-name="T3">Attachment</text:span>: Screenshot</text:p>
      <text:p text:style-name="P1"/>
      <text:p text:style-name="P1"/>
      <text:p text:style-name="P1"/>
      <text:p text:style-name="P1"><draw:frame draw:style-name="fr1" draw:name="Image1" text:anchor-type="paragraph" svg:width="14.044cm" svg:height="6.306cm" draw:z-index="0"><draw:image xlink:href="Pictures/100002010000076000000350CEA31ED56D6CE7C1.png" xlink:type="simple" xlink:show="embed" xlink:actuate="onLoad" loext:mime-type="image/png"/></draw:frame></text:p>
      <text:p text:style-name="P1"><text:soft-page-break/></text:p>
      <text:p text:style-name="P5">Bug Report 2 – Buggy App</text:p>
      <text:p text:style-name="Text_20_body"><text:span text:style-name="T2">Title</text:span><text:span text:style-name="T1">: Clicking product image redirects user to homepage instead of opening enlarged image<text:line-break/></text:span><text:span text:style-name="T2">Website</text:span><text:span text:style-name="T1">: </text:span><text:a xlink:type="simple" xlink:href="https://buggy.justtestit.org/" office:target-frame-name="_new" xlink:show="replace" text:style-name="Internet_20_link" text:visited-style-name="Visited_20_Internet_20_Link"><text:span text:style-name="T1">https://buggy.justtestit.org/</text:span></text:a><text:span text:style-name="T1"><text:line-break/></text:span><text:span text:style-name="T2">Browser</text:span><text:span text:style-name="T1">: Chrome<text:line-break/></text:span><text:span text:style-name="T2">Device</text:span><text:span text:style-name="T1">: Desktop</text:span></text:p>
      <text:p text:style-name="P1"><text:span text:style-name="T3">Description</text:span>:<text:line-break/>When a user clicks on a product image, the system redirects to the homepage instead of displaying an enlarged version of the image.</text:p>
      <text:p text:style-name="P1"><text:span text:style-name="T3">Steps to Reproduce</text:span>:</text:p>
      <text:list xml:id="list497363934" text:style-name="L2">
        <text:list-item>
          <text:p text:style-name="P7"><text:span text:style-name="T1">Open </text:span><text:a xlink:type="simple" xlink:href="https://buggy.justtestit.org/" office:target-frame-name="_new" xlink:show="replace" text:style-name="Internet_20_link" text:visited-style-name="Visited_20_Internet_20_Link"><text:span text:style-name="T1">https://buggy.justtestit.org/</text:span></text:a><text:span text:style-name="T1"> </text:span></text:p>
        </text:list-item>
        <text:list-item>
          <text:p text:style-name="P9">Select any product </text:p>
        </text:list-item>
        <text:list-item>
          <text:p text:style-name="P3">Click on the product image </text:p>
        </text:list-item>
      </text:list>
      <text:p text:style-name="P1"><text:span text:style-name="T3">Expected Result</text:span>:<text:line-break/>An enlarged version of the selected product image is displayed.</text:p>
      <text:p text:style-name="P1"><text:span text:style-name="T3">Actual Result</text:span>:<text:line-break/>The user is redirected to the homepage.</text:p>
      <text:p text:style-name="P1"><text:span text:style-name="T3">Severity</text:span>: Minor<text:line-break/><text:span text:style-name="T3">Priority</text:span>: Medium</text:p>
      <text:p text:style-name="P1"><text:span text:style-name="T3">Attachment</text:span>: Video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25T14:53:27.815000000</meta:creation-date>
    <dc:date>2026-04-25T15:27:53.046000000</dc:date>
    <meta:editing-duration>PT3M44S</meta:editing-duration>
    <meta:editing-cycles>1</meta:editing-cycles>
    <meta:document-statistic meta:table-count="0" meta:image-count="1" meta:object-count="0" meta:page-count="2" meta:paragraph-count="24" meta:word-count="192" meta:character-count="1303" meta:non-whitespace-character-count="1133"/>
    <meta:generator>Neat_Office/6.2.8.2$Windows_x86 LibreOffice_project/</meta:generator>
  </office:meta>
</office:document-meta>
</file>