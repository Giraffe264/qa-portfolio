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7600000362EA93AFFAF1FE15AC.png" manifest:media-type="image/png"/>
  <manifest:file-entry manifest:full-path="Pictures/10000201000007710000036D9EFB8B7AD95AAEB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paragraph-properties fo:text-align="start" style:justify-single-word="false"/>
    </style:style>
    <style:style style:name="P2" style:family="paragraph" style:parent-style-name="Heading_20_3">
      <style:paragraph-properties fo:text-align="start" style:justify-single-word="false"/>
      <style:text-properties officeooo:paragraph-rsid="00222070"/>
    </style:style>
    <style:style style:name="P3" style:family="paragraph" style:parent-style-name="Heading_20_3">
      <style:paragraph-properties fo:text-align="start" style:justify-single-word="false"/>
      <style:text-properties officeooo:paragraph-rsid="0031dcab"/>
    </style:style>
    <style:style style:name="P4" style:family="paragraph" style:parent-style-name="Heading_20_3">
      <style:text-properties officeooo:paragraph-rsid="002f793d"/>
    </style:style>
    <style:style style:name="P5" style:family="paragraph" style:parent-style-name="Heading_20_3">
      <style:text-properties officeooo:paragraph-rsid="0030fd4d"/>
    </style:style>
    <style:style style:name="P6" style:family="paragraph" style:parent-style-name="Text_20_body">
      <style:text-properties style:text-underline-style="none" officeooo:rsid="00179d18" officeooo:paragraph-rsid="00179d18"/>
    </style:style>
    <style:style style:name="P7" style:family="paragraph" style:parent-style-name="Text_20_body">
      <style:text-properties officeooo:paragraph-rsid="0019600b"/>
    </style:style>
    <style:style style:name="P8" style:family="paragraph" style:parent-style-name="Text_20_body">
      <style:text-properties fo:font-size="14pt" style:font-size-asian="14pt" style:font-size-complex="14pt"/>
    </style:style>
    <style:style style:name="P9" style:family="paragraph" style:parent-style-name="Text_20_body">
      <style:paragraph-properties fo:text-align="start" style:justify-single-word="false"/>
      <style:text-properties fo:font-size="14pt" style:text-underline-style="none" officeooo:rsid="00212307" officeooo:paragraph-rsid="00212307" fo:background-color="#ffff00" style:font-size-asian="14pt" style:font-size-complex="14pt"/>
    </style:style>
    <style:style style:name="P10" style:family="paragraph" style:parent-style-name="Text_20_body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1" style:family="paragraph" style:parent-style-name="Text_20_body">
      <style:text-properties style:font-name="Times New Roman" fo:font-size="14pt" fo:font-weight="normal" fo:background-color="transparent" style:font-size-asian="14pt" style:font-weight-asian="normal" style:font-size-complex="14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font-name="Times New Roman" fo:font-size="14pt" style:text-underline-style="none" fo:font-weight="normal" style:font-size-asian="14pt" style:font-weight-asian="normal" style:font-size-complex="14pt" style:font-weight-complex="normal"/>
    </style:style>
    <style:style style:name="P13" style:family="paragraph" style:parent-style-name="Text_20_body">
      <style:text-properties officeooo:paragraph-rsid="001eb9bf"/>
    </style:style>
    <style:style style:name="P14" style:family="paragraph" style:parent-style-name="Text_20_body">
      <style:text-properties officeooo:rsid="001eb9bf" officeooo:paragraph-rsid="001eb9bf" fo:background-color="#ffff00"/>
    </style:style>
    <style:style style:name="P15" style:family="paragraph" style:parent-style-name="Text_20_body">
      <style:text-properties officeooo:rsid="001ecbbf" officeooo:paragraph-rsid="001ecbbf" fo:background-color="transparent"/>
    </style:style>
    <style:style style:name="P16" style:family="paragraph" style:parent-style-name="Text_20_body">
      <style:text-properties fo:font-weight="bold" officeooo:rsid="0025b381" officeooo:paragraph-rsid="0025b381" style:font-weight-asian="bold" style:font-weight-complex="bold"/>
    </style:style>
    <style:style style:name="P17" style:family="paragraph" style:parent-style-name="Text_20_body">
      <style:text-properties fo:font-weight="bold" officeooo:rsid="0025b381" officeooo:paragraph-rsid="00279fde" style:font-weight-asian="bold" style:font-weight-complex="bold"/>
    </style:style>
    <style:style style:name="P18" style:family="paragraph" style:parent-style-name="Text_20_body">
      <style:text-properties fo:font-weight="bold" officeooo:rsid="00332336" officeooo:paragraph-rsid="00332336" style:font-weight-asian="bold" style:font-weight-complex="bold"/>
    </style:style>
    <style:style style:name="P19" style:family="paragraph" style:parent-style-name="Text_20_body">
      <style:text-properties fo:font-weight="bold" officeooo:rsid="00332336" officeooo:paragraph-rsid="00332336" fo:background-color="#ffff00" style:font-weight-asian="bold" style:font-weight-complex="bold"/>
    </style:style>
    <style:style style:name="P20" style:family="paragraph" style:parent-style-name="Text_20_body">
      <style:text-properties officeooo:rsid="00206801" officeooo:paragraph-rsid="00206801" fo:background-color="#ff4000"/>
    </style:style>
    <style:style style:name="P21" style:family="paragraph" style:parent-style-name="Text_20_body">
      <style:text-properties fo:font-size="15pt" officeooo:rsid="00206801" officeooo:paragraph-rsid="00206801" fo:background-color="#ff4000" style:font-size-asian="15pt" style:font-size-complex="15pt"/>
    </style:style>
    <style:style style:name="P22" style:family="paragraph" style:parent-style-name="Text_20_body">
      <style:text-properties fo:font-size="15pt" officeooo:rsid="00206801" officeooo:paragraph-rsid="00239501" fo:background-color="#ff4000" style:font-size-asian="15pt" style:font-size-complex="15pt"/>
    </style:style>
    <style:style style:name="P23" style:family="paragraph" style:parent-style-name="Text_20_body">
      <style:text-properties fo:font-size="15pt" officeooo:rsid="001eb9bf" officeooo:paragraph-rsid="001eb9bf" fo:background-color="#ffff00" style:font-size-asian="15pt" style:font-size-complex="15pt"/>
    </style:style>
    <style:style style:name="P24" style:family="paragraph" style:parent-style-name="Text_20_body">
      <style:text-properties fo:font-size="15pt" officeooo:rsid="00212307" officeooo:paragraph-rsid="00212307" fo:background-color="#ffff00" style:font-size-asian="15pt" style:font-size-complex="15pt"/>
    </style:style>
    <style:style style:name="P25" style:family="paragraph" style:parent-style-name="Text_20_body">
      <style:text-properties officeooo:paragraph-rsid="00206801"/>
    </style:style>
    <style:style style:name="P26" style:family="paragraph" style:parent-style-name="Text_20_body">
      <style:paragraph-properties fo:text-align="start" style:justify-single-word="false"/>
    </style:style>
    <style:style style:name="P27" style:family="paragraph" style:parent-style-name="Text_20_body">
      <style:paragraph-properties fo:text-align="start" style:justify-single-word="false"/>
      <style:text-properties officeooo:paragraph-rsid="00222070"/>
    </style:style>
    <style:style style:name="P28" style:family="paragraph" style:parent-style-name="Text_20_body">
      <style:paragraph-properties fo:text-align="start" style:justify-single-word="false"/>
      <style:text-properties officeooo:paragraph-rsid="0022e9a4"/>
    </style:style>
    <style:style style:name="P29" style:family="paragraph" style:parent-style-name="Text_20_body">
      <style:text-properties officeooo:paragraph-rsid="0024e55b"/>
    </style:style>
    <style:style style:name="P30" style:family="paragraph" style:parent-style-name="Text_20_body">
      <style:text-properties officeooo:rsid="00212307" officeooo:paragraph-rsid="0024e55b"/>
    </style:style>
    <style:style style:name="P31" style:family="paragraph" style:parent-style-name="Text_20_body">
      <style:text-properties officeooo:rsid="00212307" officeooo:paragraph-rsid="0027d443"/>
    </style:style>
    <style:style style:name="P32" style:family="paragraph" style:parent-style-name="Text_20_body">
      <style:text-properties officeooo:rsid="00212307" officeooo:paragraph-rsid="002f5d6c"/>
    </style:style>
    <style:style style:name="P33" style:family="paragraph" style:parent-style-name="Text_20_body">
      <style:text-properties officeooo:paragraph-rsid="0025b381"/>
    </style:style>
    <style:style style:name="P34" style:family="paragraph" style:parent-style-name="Text_20_body">
      <style:text-properties officeooo:paragraph-rsid="002f793d"/>
    </style:style>
    <style:style style:name="P35" style:family="paragraph" style:parent-style-name="Text_20_body">
      <style:text-properties style:text-line-through-style="none" style:text-line-through-type="none" fo:font-size="14pt" style:font-size-asian="14pt" style:font-size-complex="14pt"/>
    </style:style>
    <style:style style:name="P36" style:family="paragraph" style:parent-style-name="Text_20_body">
      <style:text-properties officeooo:paragraph-rsid="0030fd4d"/>
    </style:style>
    <style:style style:name="P37" style:family="paragraph" style:parent-style-name="Text_20_body">
      <style:text-properties officeooo:paragraph-rsid="0031dcab"/>
    </style:style>
    <style:style style:name="P38" style:family="paragraph" style:parent-style-name="Text_20_body">
      <style:text-properties officeooo:rsid="00332336" officeooo:paragraph-rsid="00332336"/>
    </style:style>
    <style:style style:name="P39" style:family="paragraph" style:parent-style-name="Standard">
      <style:text-properties officeooo:rsid="00179d18" officeooo:paragraph-rsid="00179d18"/>
    </style:style>
    <style:style style:name="P40" style:family="paragraph" style:parent-style-name="Standard">
      <style:text-properties style:text-underline-style="solid" style:text-underline-width="auto" style:text-underline-color="font-color" officeooo:rsid="00179d18" officeooo:paragraph-rsid="00179d18"/>
    </style:style>
    <style:style style:name="P41" style:family="paragraph" style:parent-style-name="Standard">
      <style:text-properties style:text-underline-style="none" officeooo:rsid="00179d18" officeooo:paragraph-rsid="00179d18"/>
    </style:style>
    <style:style style:name="P42" style:family="paragraph" style:parent-style-name="Standard">
      <style:text-properties style:text-underline-style="none" officeooo:rsid="00179d18" officeooo:paragraph-rsid="001eb9bf"/>
    </style:style>
    <style:style style:name="P43" style:family="paragraph" style:parent-style-name="Standard">
      <style:text-properties style:text-underline-style="none" officeooo:rsid="0019600b" officeooo:paragraph-rsid="0019600b" fo:background-color="#ffff00"/>
    </style:style>
    <style:style style:name="P44" style:family="paragraph" style:parent-style-name="Standard">
      <style:text-properties style:text-underline-style="none" officeooo:rsid="00179d18" officeooo:paragraph-rsid="00179d18" fo:background-color="transparent"/>
    </style:style>
    <style:style style:name="P45" style:family="paragraph" style:parent-style-name="Standard">
      <style:text-properties fo:color="#000000" style:text-underline-style="none" officeooo:rsid="00179d18" officeooo:paragraph-rsid="00179d18"/>
    </style:style>
    <style:style style:name="P46" style:family="paragraph" style:parent-style-name="Standard">
      <style:text-properties fo:color="#000000" style:text-underline-style="none" fo:font-weight="bold" officeooo:rsid="00179d18" officeooo:paragraph-rsid="00206801" style:font-weight-asian="bold" style:font-weight-complex="bold"/>
    </style:style>
    <style:style style:name="P47" style:family="paragraph" style:parent-style-name="Standard">
      <style:text-properties fo:color="#000000" style:font-name="Times New Roman" style:text-underline-style="none" officeooo:rsid="001836b5" officeooo:paragraph-rsid="001836b5" fo:background-color="#ffff00"/>
    </style:style>
    <style:style style:name="P48" style:family="paragraph" style:parent-style-name="Standard">
      <style:text-properties fo:color="#000000" style:font-name="Times New Roman" style:text-underline-style="none" officeooo:rsid="001836b5" officeooo:paragraph-rsid="001836b5" fo:background-color="transparent"/>
    </style:style>
    <style:style style:name="P49" style:family="paragraph" style:parent-style-name="Standard">
      <style:text-properties fo:color="#00a933" style:font-name="Times New Roman" style:text-underline-style="none" officeooo:rsid="00179d18" officeooo:paragraph-rsid="00179d18" fo:background-color="#ff8000"/>
    </style:style>
    <style:style style:name="P50" style:family="paragraph" style:parent-style-name="Standard">
      <style:text-properties fo:color="#158466" style:font-name="Times New Roman" style:text-underline-style="none" officeooo:rsid="001836b5" officeooo:paragraph-rsid="001836b5" fo:background-color="#ffbf00"/>
    </style:style>
    <style:style style:name="P51" style:family="paragraph" style:parent-style-name="Standard">
      <style:text-properties fo:font-size="15pt" style:text-underline-style="none" officeooo:rsid="00179d18" officeooo:paragraph-rsid="00179d18" style:font-size-asian="15pt" style:font-size-complex="1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27d443" style:font-size-asian="14pt" style:font-size-complex="14pt"/>
    </style:style>
    <style:style style:name="T3" style:family="text">
      <style:text-properties fo:font-size="14pt" fo:background-color="transparent" loext:char-shading-value="0" style:font-size-asian="14pt" style:font-size-complex="14pt"/>
    </style:style>
    <style:style style:name="T4" style:family="text">
      <style:text-properties fo:font-size="14pt" officeooo:rsid="001a7726" fo:background-color="transparent" loext:char-shading-value="0" style:font-size-asian="14pt" style:font-size-complex="14pt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3faf46" fo:font-size="14pt" fo:background-color="transparent" loext:char-shading-value="0" style:font-size-asian="14pt" style:font-size-complex="14pt"/>
    </style:style>
    <style:style style:name="T9" style:family="text">
      <style:text-properties fo:color="#ff860d" fo:font-size="18pt" style:font-size-asian="18pt" style:font-size-complex="18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color="#000000" style:font-name="Times New Roman" fo:font-size="14pt" fo:font-weight="normal" fo:background-color="transparent" loext:char-shading-value="0" style:font-size-asian="14pt" style:font-weight-asian="normal" style:font-size-complex="14pt" style:font-weight-complex="normal"/>
    </style:style>
    <style:style style:name="T12" style:family="text">
      <style:text-properties fo:color="#000000" style:font-name="Times New Roman" fo:font-size="14pt" fo:font-weight="normal" officeooo:rsid="0019600b" fo:background-color="transparent" loext:char-shading-value="0" style:font-size-asian="14pt" style:font-weight-asian="normal" style:font-size-complex="14pt" style:font-weight-complex="normal"/>
    </style:style>
    <style:style style:name="T13" style:family="text">
      <style:text-properties fo:color="#000000" style:font-name="Times New Roman" fo:font-size="14pt" fo:font-weight="normal" officeooo:rsid="0027d443" fo:background-color="transparent" loext:char-shading-value="0" style:font-size-asian="14pt" style:font-weight-asian="normal" style:font-size-complex="14pt" style:font-weight-complex="normal"/>
    </style:style>
    <style:style style:name="T14" style:family="text">
      <style:text-properties fo:color="#000000" style:font-name="Times New Roman" fo:font-size="14pt" fo:font-weight="normal" officeooo:rsid="002f5d6c" fo:background-color="transparent" loext:char-shading-value="0" style:font-size-asian="14pt" style:font-weight-asian="normal" style:font-size-complex="14pt" style:font-weight-complex="normal"/>
    </style:style>
    <style:style style:name="T15" style:family="text">
      <style:text-properties fo:color="#000000" style:font-name="Times New Roman" fo:font-size="14pt" fo:font-weight="normal" officeooo:rsid="002f793d" fo:background-color="transparent" loext:char-shading-value="0" style:font-size-asian="14pt" style:font-weight-asian="normal" style:font-size-complex="14pt" style:font-weight-complex="normal"/>
    </style:style>
    <style:style style:name="T16" style:family="text"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color="#000000" style:font-name="Times New Roman" fo:font-size="14pt" fo:font-weight="normal" officeooo:rsid="0019600b" fo:background-color="#ffff00" loext:char-shading-value="0" style:font-size-asian="14pt" style:font-weight-asian="normal" style:font-size-complex="14pt" style:font-weight-complex="normal"/>
    </style:style>
    <style:style style:name="T18" style:family="text">
      <style:text-properties fo:color="#000000" style:font-name="Times New Roman" fo:font-size="14pt" officeooo:rsid="0027d443" fo:background-color="transparent" loext:char-shading-value="0" style:font-size-asian="14pt" style:font-size-complex="14pt"/>
    </style:style>
    <style:style style:name="T19" style:family="text">
      <style:text-properties fo:color="#000000" style:font-name="Times New Roman" fo:font-size="14pt" officeooo:rsid="002f793d" fo:background-color="transparent" loext:char-shading-value="0" style:font-size-asian="14pt" style:font-size-complex="14pt"/>
    </style:style>
    <style:style style:name="T20" style:family="text">
      <style:text-properties fo:color="#000000" style:font-name="Times New Roman" fo:font-size="14pt" style:text-underline-style="none" fo:font-weight="normal" officeooo:rsid="0019600b" fo:background-color="transparent" loext:char-shading-value="0" style:font-size-asian="14pt" style:font-weight-asian="normal" style:font-size-complex="14pt" style:font-weight-complex="normal"/>
    </style:style>
    <style:style style:name="T21" style:family="text">
      <style:text-properties fo:color="#000000" style:font-name="Times New Roman" fo:font-size="14pt" fo:font-weight="bold" officeooo:rsid="002f5d6c" fo:background-color="#ffff00" loext:char-shading-value="0" style:font-size-asian="14pt" style:font-weight-asian="bold" style:font-size-complex="14pt" style:font-weight-complex="bold"/>
    </style:style>
    <style:style style:name="T22" style:family="text">
      <style:text-properties fo:color="#000000" style:font-name="Times New Roman" fo:font-size="14pt" fo:font-weight="bold" officeooo:rsid="0019600b" fo:background-color="transparent" loext:char-shading-value="0" style:font-size-asian="14pt" style:font-weight-asian="bold" style:font-size-complex="14pt" style:font-weight-complex="bold"/>
    </style:style>
    <style:style style:name="T23" style:family="text">
      <style:text-properties fo:color="#000000" style:font-name="Times New Roman" fo:font-size="14pt" fo:font-weight="bold" officeooo:rsid="0022e9a4" fo:background-color="transparent" loext:char-shading-value="0" style:font-size-asian="14pt" style:font-weight-asian="bold" style:font-size-complex="14pt" style:font-weight-complex="bold"/>
    </style:style>
    <style:style style:name="T24" style:family="text">
      <style:text-properties fo:color="#000000" style:font-name="Times New Roman" fo:font-size="14pt" fo:font-weight="bold" officeooo:rsid="002f793d" fo:background-color="transparent" loext:char-shading-value="0" style:font-size-asian="14pt" style:font-weight-asian="bold" style:font-size-complex="14pt" style:font-weight-complex="bold"/>
    </style:style>
    <style:style style:name="T25" style:family="text">
      <style:text-properties fo:color="#000000" style:font-name="Times New Roman" fo:font-weight="normal" officeooo:rsid="0019600b" fo:background-color="#ffff00" loext:char-shading-value="0" style:font-weight-asian="normal" style:font-weight-complex="normal"/>
    </style:style>
    <style:style style:name="T26" style:family="text">
      <style:text-properties fo:color="#000000" style:font-name="Times New Roman" fo:font-weight="normal" fo:background-color="transparent" loext:char-shading-value="0" style:font-weight-asian="normal" style:font-weight-complex="normal"/>
    </style:style>
    <style:style style:name="T27" style:family="text">
      <style:text-properties fo:color="#000000" fo:font-weight="normal" officeooo:rsid="002f793d" fo:background-color="transparent" loext:char-shading-value="0" style:font-weight-asian="normal" style:font-weight-complex="normal"/>
    </style:style>
    <style:style style:name="T28" style:family="text">
      <style:text-properties style:font-name="Times New Roman" fo:font-size="14pt" style:font-size-asian="14pt" style:font-size-complex="14pt"/>
    </style:style>
    <style:style style:name="T29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30" style:family="text">
      <style:text-properties style:font-name="Times New Roman" fo:font-size="14pt" fo:font-weight="bold" officeooo:rsid="0024e55b" style:font-size-asian="14pt" style:font-weight-asian="bold" style:font-size-complex="14pt" style:font-weight-complex="bold"/>
    </style:style>
    <style:style style:name="T31" style:family="text">
      <style:text-properties style:font-name="Times New Roman" fo:font-size="14pt" fo:font-weight="bold" fo:background-color="transparent" loext:char-shading-value="0" style:font-size-asian="14pt" style:font-weight-asian="bold" style:font-size-complex="14pt" style:font-weight-complex="bold"/>
    </style:style>
    <style:style style:name="T32" style:family="text">
      <style:text-properties style:font-name="Times New Roman" fo:font-size="14pt" fo:font-weight="bold" fo:background-color="transparent" loext:char-shading-value="0" style:font-size-asian="14pt" style:font-weight-asian="bold" style:font-size-complex="14pt" style:font-weight-complex="bold"/>
    </style:style>
    <style:style style:name="T33" style:family="text">
      <style:text-properties style:font-name="Times New Roman" fo:font-size="14pt" fo:font-weight="bold" officeooo:rsid="0022e9a4" fo:background-color="transparent" loext:char-shading-value="0" style:font-size-asian="14pt" style:font-weight-asian="bold" style:font-size-complex="14pt" style:font-weight-complex="bold"/>
    </style:style>
    <style:style style:name="T34" style:family="text">
      <style:text-properties style:font-name="Times New Roman" fo:font-size="14pt" fo:font-weight="bold" officeooo:rsid="00212307" fo:background-color="transparent" loext:char-shading-value="0" style:font-size-asian="14pt" style:font-weight-asian="bold" style:font-size-complex="14pt" style:font-weight-complex="bold"/>
    </style:style>
    <style:style style:name="T35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36" style:family="text">
      <style:text-properties style:font-name="Times New Roman" fo:font-size="14pt" fo:font-weight="normal" officeooo:rsid="001f486f" style:font-size-asian="14pt" style:font-weight-asian="normal" style:font-size-complex="14pt" style:font-weight-complex="normal"/>
    </style:style>
    <style:style style:name="T37" style:family="text">
      <style:text-properties style:font-name="Times New Roman" fo:font-size="14pt" fo:font-weight="normal" officeooo:rsid="0024e55b" style:font-size-asian="14pt" style:font-weight-asian="normal" style:font-size-complex="14pt" style:font-weight-complex="normal"/>
    </style:style>
    <style:style style:name="T38" style:family="text">
      <style:text-properties style:font-name="Times New Roman" fo:font-size="14pt" fo:font-weight="normal" officeooo:rsid="0030fd4d" style:font-size-asian="14pt" style:font-weight-asian="normal" style:font-size-complex="14pt" style:font-weight-complex="normal"/>
    </style:style>
    <style:style style:name="T39" style:family="text">
      <style:text-properties style:font-name="Times New Roman" fo:font-size="14pt" fo:font-weight="normal" officeooo:rsid="0031dcab" style:font-size-asian="14pt" style:font-weight-asian="normal" style:font-size-complex="14pt" style:font-weight-complex="normal"/>
    </style:style>
    <style:style style:name="T40" style:family="text">
      <style:text-properties style:font-name="Times New Roman" fo:font-size="14pt" fo:font-weight="normal" fo:background-color="transparent" loext:char-shading-value="0" style:font-size-asian="14pt" style:font-weight-asian="normal" style:font-size-complex="14pt" style:font-weight-complex="normal"/>
    </style:style>
    <style:style style:name="T41" style:family="text">
      <style:text-properties style:font-name="Times New Roman" fo:font-size="14pt" fo:font-weight="normal" fo:background-color="transparent" loext:char-shading-value="0" style:font-size-asian="14pt" style:font-weight-asian="normal" style:font-size-complex="14pt" style:font-weight-complex="normal"/>
    </style:style>
    <style:style style:name="T42" style:family="text">
      <style:text-properties style:font-name="Times New Roman" fo:font-size="14pt" fo:font-weight="normal" officeooo:rsid="001ea317" fo:background-color="transparent" loext:char-shading-value="0" style:font-size-asian="14pt" style:font-weight-asian="normal" style:font-size-complex="14pt" style:font-weight-complex="normal"/>
    </style:style>
    <style:style style:name="T43" style:family="text">
      <style:text-properties style:font-name="Times New Roman" fo:font-size="14pt" fo:font-weight="normal" officeooo:rsid="001f486f" fo:background-color="transparent" loext:char-shading-value="0" style:font-size-asian="14pt" style:font-weight-asian="normal" style:font-size-complex="14pt" style:font-weight-complex="normal"/>
    </style:style>
    <style:style style:name="T44" style:family="text">
      <style:text-properties style:font-name="Times New Roman" fo:font-size="14pt" fo:font-weight="normal" officeooo:rsid="00206801" fo:background-color="transparent" loext:char-shading-value="0" style:font-size-asian="14pt" style:font-weight-asian="normal" style:font-size-complex="14pt" style:font-weight-complex="normal"/>
    </style:style>
    <style:style style:name="T45" style:family="text">
      <style:text-properties style:font-name="Times New Roman" fo:font-size="14pt" fo:font-weight="normal" officeooo:rsid="00212307" fo:background-color="transparent" loext:char-shading-value="0" style:font-size-asian="14pt" style:font-weight-asian="normal" style:font-size-complex="14pt" style:font-weight-complex="normal"/>
    </style:style>
    <style:style style:name="T46" style:family="text">
      <style:text-properties style:font-name="Times New Roman" fo:font-size="14pt" fo:font-weight="normal" officeooo:rsid="0025b381" fo:background-color="transparent" loext:char-shading-value="0" style:font-size-asian="14pt" style:font-weight-asian="normal" style:font-size-complex="14pt" style:font-weight-complex="normal"/>
    </style:style>
    <style:style style:name="T47" style:family="text">
      <style:text-properties style:font-name="Times New Roman" fo:font-size="14pt" fo:font-style="normal" style:text-underline-style="none" fo:font-weight="bold" officeooo:rsid="0022e9a4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48" style:family="text">
      <style:text-properties style:font-name="Times New Roman" fo:font-size="14pt" fo:font-style="normal" style:text-underline-style="none" officeooo:rsid="0022e9a4" fo:background-color="transparent" loext:char-shading-value="0" style:font-size-asian="14pt" style:font-style-asian="normal" style:font-size-complex="14pt" style:font-style-complex="normal"/>
    </style:style>
    <style:style style:name="T49" style:family="text">
      <style:text-properties style:font-name="Times New Roman" fo:font-size="14pt" officeooo:rsid="0022e9a4" fo:background-color="transparent" loext:char-shading-value="0" style:font-size-asian="14pt" style:font-size-complex="14pt"/>
    </style:style>
    <style:style style:name="T50" style:family="text">
      <style:text-properties style:font-name="Times New Roman" fo:font-size="14pt" style:text-underline-style="none" fo:font-weight="normal" officeooo:rsid="00212307" fo:background-color="transparent" loext:char-shading-value="0" style:font-size-asian="14pt" style:font-weight-asian="normal" style:font-size-complex="14pt" style:font-weight-complex="normal"/>
    </style:style>
    <style:style style:name="T51" style:family="text">
      <style:text-properties style:font-name="Times New Roman" fo:font-size="14pt" style:text-underline-style="none" fo:font-weight="normal" fo:background-color="transparent" loext:char-shading-value="0" style:font-size-asian="14pt" style:font-weight-asian="normal" style:font-size-complex="14pt" style:font-weight-complex="normal"/>
    </style:style>
    <style:style style:name="T52" style:family="text">
      <style:text-properties style:font-name="Times New Roman" fo:font-size="14pt" style:text-underline-style="none" fo:font-weight="normal" officeooo:rsid="0022e9a4" fo:background-color="transparent" loext:char-shading-value="0" style:font-size-asian="14pt" style:font-weight-asian="normal" style:font-size-complex="14pt" style:font-weight-complex="normal"/>
    </style:style>
    <style:style style:name="T53" style:family="text">
      <style:text-properties style:font-name="Times New Roman" fo:font-size="14pt" style:text-underline-style="none" fo:font-weight="normal" style:font-size-asian="14pt" style:font-weight-asian="normal" style:font-size-complex="14pt" style:font-weight-complex="normal"/>
    </style:style>
    <style:style style:name="T54" style:family="text">
      <style:text-properties style:font-name="Times New Roman" fo:font-size="14pt" style:text-underline-style="none" fo:font-weight="normal" officeooo:rsid="00222070" style:font-size-asian="14pt" style:font-weight-asian="normal" style:font-size-complex="14pt" style:font-weight-complex="normal"/>
    </style:style>
    <style:style style:name="T55" style:family="text">
      <style:text-properties style:font-name="Times New Roman" fo:font-size="14pt" style:text-underline-style="none" fo:font-weight="normal" officeooo:rsid="0022e9a4" style:font-size-asian="14pt" style:font-weight-asian="normal" style:font-size-complex="14pt" style:font-weight-complex="normal"/>
    </style:style>
    <style:style style:name="T56" style:family="text">
      <style:text-properties style:font-name="Times New Roman" fo:font-size="14pt" style:text-underline-style="none" fo:font-weight="normal" officeooo:rsid="00234d51" style:font-size-asian="14pt" style:font-weight-asian="normal" style:font-size-complex="14pt" style:font-weight-complex="normal"/>
    </style:style>
    <style:style style:name="T57" style:family="text">
      <style:text-properties style:font-name="Times New Roman" fo:font-size="14pt" style:text-underline-style="none" fo:font-weight="normal" officeooo:rsid="00239501" style:font-size-asian="14pt" style:font-weight-asian="normal" style:font-size-complex="14pt" style:font-weight-complex="normal"/>
    </style:style>
    <style:style style:name="T58" style:family="text">
      <style:text-properties style:font-name="Times New Roman" fo:font-size="14pt" style:text-underline-style="none" fo:font-weight="normal" officeooo:rsid="0027d443" style:font-size-asian="14pt" style:font-weight-asian="normal" style:font-size-complex="14pt" style:font-weight-complex="normal"/>
    </style:style>
    <style:style style:name="T59" style:family="text">
      <style:text-properties style:font-name="Times New Roman" fo:font-size="14pt" style:text-underline-style="none" fo:font-weight="normal" officeooo:rsid="002bffb1" style:font-size-asian="14pt" style:font-weight-asian="normal" style:font-size-complex="14pt" style:font-weight-complex="normal"/>
    </style:style>
    <style:style style:name="T60" style:family="text">
      <style:text-properties style:font-name="Times New Roman" fo:font-size="14pt" style:text-underline-style="none" fo:font-weight="bold" officeooo:rsid="00212307" fo:background-color="transparent" loext:char-shading-value="0" style:font-size-asian="14pt" style:font-weight-asian="bold" style:font-size-complex="14pt" style:font-weight-complex="bold"/>
    </style:style>
    <style:style style:name="T61" style:family="text">
      <style:text-properties style:font-name="Times New Roman" fo:font-size="14pt" style:text-underline-style="none" fo:font-weight="bold" style:font-size-asian="14pt" style:font-weight-asian="bold" style:font-size-complex="14pt" style:font-weight-complex="bold"/>
    </style:style>
    <style:style style:name="T62" style:family="text">
      <style:text-properties style:font-name="Times New Roman" fo:font-size="14pt" style:text-underline-style="none" fo:font-weight="bold" officeooo:rsid="0022e9a4" style:font-size-asian="14pt" style:font-weight-asian="bold" style:font-size-complex="14pt" style:font-weight-complex="bold"/>
    </style:style>
    <style:style style:name="T63" style:family="text">
      <style:text-properties style:font-name="Times New Roman" fo:font-size="14pt" style:text-underline-style="none" fo:font-weight="bold" officeooo:rsid="0031dcab" style:font-size-asian="14pt" style:font-weight-asian="bold" style:font-size-complex="14pt" style:font-weight-complex="bold"/>
    </style:style>
    <style:style style:name="T64" style:family="text">
      <style:text-properties style:font-name="Times New Roman" fo:font-size="14pt" style:text-underline-style="none" style:font-size-asian="14pt" style:font-size-complex="14pt"/>
    </style:style>
    <style:style style:name="T65" style:family="text">
      <style:text-properties style:font-name="Times New Roman" fo:font-weight="normal" style:font-weight-asian="normal" style:font-weight-complex="normal"/>
    </style:style>
    <style:style style:name="T66" style:family="text">
      <style:text-properties style:font-name="Times New Roman" fo:font-weight="normal" fo:background-color="transparent" loext:char-shading-value="0" style:font-weight-asian="normal" style:font-weight-complex="normal"/>
    </style:style>
    <style:style style:name="T67" style:family="text">
      <style:text-properties officeooo:rsid="001f486f"/>
    </style:style>
    <style:style style:name="T68" style:family="text">
      <style:text-properties fo:font-size="15pt" officeooo:rsid="00212307" fo:background-color="transparent" loext:char-shading-value="0" style:font-size-asian="15pt" style:font-size-complex="15pt"/>
    </style:style>
    <style:style style:name="T69" style:family="text">
      <style:text-properties officeooo:rsid="00222070"/>
    </style:style>
    <style:style style:name="T70" style:family="text">
      <style:text-properties officeooo:rsid="0022e9a4"/>
    </style:style>
    <style:style style:name="T71" style:family="text">
      <style:text-properties style:use-window-font-color="true" style:font-name="Times New Roman" fo:font-size="14pt" fo:font-weight="bold" officeooo:rsid="0024e55b" fo:background-color="transparent" loext:char-shading-value="0" style:font-size-asian="14pt" style:font-weight-asian="bold" style:font-size-complex="14pt" style:font-weight-complex="bold"/>
    </style:style>
    <style:style style:name="T72" style:family="text">
      <style:text-properties style:use-window-font-color="true" style:font-name="Times New Roman" fo:font-size="14pt" fo:font-weight="normal" officeooo:rsid="0024e55b" fo:background-color="transparent" loext:char-shading-value="0" style:font-size-asian="14pt" style:font-weight-asian="normal" style:font-size-complex="14pt" style:font-weight-complex="normal"/>
    </style:style>
    <style:style style:name="T73" style:family="text">
      <style:text-properties fo:color="#00a933" style:font-name="Times New Roman" fo:font-size="14pt" fo:font-weight="bold" officeooo:rsid="0027d443" fo:background-color="#ffbf00" loext:char-shading-value="0" style:font-size-asian="14pt" style:font-weight-asian="bold" style:font-size-complex="14pt" style:font-weight-complex="bold"/>
    </style:style>
    <style:style style:name="T74" style:family="text">
      <style:text-properties officeooo:rsid="0030fd4d"/>
    </style:style>
    <style:style style:name="T75" style:family="text">
      <style:text-properties officeooo:rsid="0031dcab"/>
    </style:style>
    <style:style style:name="T76" style:family="text">
      <style:text-properties fo:font-variant="normal" fo:text-transform="none" fo:color="#000000" style:font-name="Times New Roman" fo:font-size="14pt" fo:letter-spacing="normal" fo:font-style="normal" fo:font-weight="normal" officeooo:rsid="0031dcab" style:font-size-asian="14pt" style:font-weight-asian="normal" style:font-size-complex="14pt" style:font-weight-complex="normal"/>
    </style:style>
    <style:style style:name="T77" style:family="text">
      <style:text-properties fo:font-variant="normal" fo:text-transform="none" fo:color="#000000" style:font-name="Times New Roman" fo:font-size="14pt" fo:letter-spacing="normal" fo:font-style="normal" style:text-underline-style="none" fo:font-weight="bold" style:font-size-asian="14pt" style:font-weight-asian="bold" style:font-size-complex="14pt" style:font-weight-complex="bold"/>
    </style:style>
    <style:style style:name="T78" style:family="text">
      <style:text-properties fo:font-variant="normal" fo:text-transform="none" fo:color="#000000" style:font-name="Times New Roman" fo:font-size="14pt" fo:letter-spacing="normal" fo:font-style="normal" style:text-underline-style="none" fo:font-weight="bold" officeooo:rsid="0022e9a4" style:font-size-asian="14pt" style:font-weight-asian="bold" style:font-size-complex="14pt" style:font-weight-complex="bold"/>
    </style:style>
    <style:style style:name="T79" style:family="text">
      <style:text-properties fo:font-variant="normal" fo:text-transform="none" fo:color="#000000" style:font-name="Times New Roman" fo:font-size="14pt" fo:letter-spacing="normal" fo:font-style="normal" style:text-underline-style="none" fo:font-weight="bold" officeooo:rsid="0031dcab" style:font-size-asian="14pt" style:font-style-asian="normal" style:font-weight-asian="bold" style:font-size-complex="14pt" style:font-style-complex="normal" style:font-weight-complex="bold"/>
    </style:style>
    <style:style style:name="T80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T81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 officeooo:rsid="0022e9a4" style:font-size-asian="14pt" style:font-weight-asian="normal" style:font-size-complex="14pt" style:font-weight-complex="normal"/>
    </style:style>
    <style:style style:name="T82" style:family="text">
      <style:text-properties fo:font-variant="normal" fo:text-transform="none" fo:color="#000000" style:font-name="Times New Roman" fo:font-size="14pt" fo:letter-spacing="normal" fo:font-style="normal" style:text-underline-style="none" style:font-size-asian="14pt" style:font-size-complex="14pt"/>
    </style:style>
    <style:style style:name="T83" style:family="text">
      <style:text-properties fo:font-variant="normal" fo:text-transform="none" fo:color="#000000" style:font-name="Times New Roman" fo:font-size="14pt" fo:letter-spacing="normal" fo:font-style="normal" style:text-underline-style="none" officeooo:rsid="0022e9a4" style:font-size-asian="14pt" style:font-size-complex="14pt"/>
    </style:style>
    <style:style style:name="T84" style:family="text">
      <style:text-properties fo:font-variant="normal" fo:text-transform="none" fo:color="#000000" style:font-name="Times New Roman" fo:font-size="14pt" fo:letter-spacing="normal" style:text-underline-style="none" fo:font-weight="normal" style:font-size-asian="14pt" style:font-weight-asian="normal" style:font-size-complex="14pt" style:font-weight-complex="normal"/>
    </style:style>
    <style:style style:name="T85" style:family="text">
      <style:text-properties fo:font-variant="normal" fo:text-transform="none" fo:color="#000000" style:font-name="Times New Roman" fo:font-size="14pt" fo:letter-spacing="normal" style:text-underline-style="none" fo:font-weight="bold" style:font-size-asian="14pt" style:font-weight-asian="bold" style:font-size-complex="14pt" style:font-weight-complex="bold"/>
    </style:style>
    <style:style style:name="T86" style:family="text">
      <style:text-properties fo:font-variant="normal" fo:text-transform="none" fo:color="#000000" style:font-name="Times New Roman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87" style:family="text">
      <style:text-properties fo:font-variant="normal" fo:text-transform="none" fo:color="#000000" style:font-name="Times New Roman" fo:font-size="14pt" fo:letter-spacing="normal" fo:font-style="italic" style:text-underline-style="none" style:font-size-asian="14pt" style:font-style-asian="italic" style:font-size-complex="14pt" style:font-style-complex="italic"/>
    </style:style>
    <style:style style:name="T88" style:family="text">
      <style:text-properties fo:font-variant="normal" fo:text-transform="none" fo:color="#000000" style:font-name="Times New Roman" fo:font-size="14pt" fo:letter-spacing="normal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89" style:family="text">
      <style:text-properties fo:font-variant="normal" fo:text-transform="none" fo:color="#000000" style:font-name="Times New Roman" fo:letter-spacing="normal" fo:font-style="normal" style:text-underline-style="none" fo:font-weight="bold" style:font-weight-asian="bold" style:font-weight-complex="bold"/>
    </style:style>
    <style:style style:name="T90" style:family="text">
      <style:text-properties fo:font-variant="normal" fo:text-transform="none" fo:color="#000000" style:font-name="Times New Roman" fo:letter-spacing="normal" fo:font-style="normal" style:text-underline-style="none" fo:font-weight="bold" officeooo:rsid="0022e9a4" style:font-weight-asian="bold" style:font-weight-complex="bold"/>
    </style:style>
    <style:style style:name="T91" style:family="text">
      <style:text-properties fo:font-variant="normal" fo:text-transform="none" fo:color="#000000" style:font-name="Times New Roman" fo:letter-spacing="normal" fo:font-style="normal" style:text-underline-style="none" fo:font-weight="normal" style:font-weight-asian="normal" style:font-weight-complex="normal"/>
    </style:style>
    <style:style style:name="T92" style:family="text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93" style:family="text">
      <style:text-properties fo:font-variant="normal" fo:text-transform="none" fo:color="#000000" style:font-name="Times New Roman1" fo:font-size="14pt" fo:letter-spacing="normal" fo:font-style="normal" fo:font-weight="normal" officeooo:rsid="0031dcab"/>
    </style:style>
    <style:style style:name="T94" style:family="text">
      <style:text-properties fo:font-variant="normal" fo:text-transform="none" fo:color="#000000" fo:font-size="14pt" fo:letter-spacing="normal" fo:font-style="normal" style:text-underline-style="none" fo:font-weight="bold" style:font-size-asian="14pt" style:font-weight-asian="bold" style:font-size-complex="14pt" style:font-weight-complex="bold"/>
    </style:style>
    <style:style style:name="T95" style:family="text">
      <style:text-properties fo:font-variant="normal" fo:text-transform="none" fo:color="#000000" fo:font-size="14pt" fo:letter-spacing="normal" fo:font-style="normal" style:text-underline-style="none" fo:font-weight="bold" officeooo:rsid="0022e9a4" style:font-size-asian="14pt" style:font-weight-asian="bold" style:font-size-complex="14pt" style:font-weight-complex="bold"/>
    </style:style>
    <style:style style:name="T96" style:family="text">
      <style:text-properties fo:font-variant="normal" fo:text-transform="none" fo:color="#000000" fo:font-size="14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text:span text:style-name="T7">Elma Handžić <text:s text:c="2"/></text:span><text:span text:style-name="T1"><text:s text:c="12"/></text:span><text:s text:c="70"/><text:span text:style-name="T7"><text:s text:c="7"/>23.11.2025.</text:span></text:p>
      <text:p text:style-name="P39"><text:span text:style-name="T1"/></text:p>
      <text:p text:style-name="P39"><text:span text:style-name="T1"/></text:p>
      <text:p text:style-name="P41"><text:span text:style-name="T1"/></text:p>
      <text:p text:style-name="P42"><text:span text:style-name="T1"><text:s text:c="36"/></text:span></text:p>
      <text:p text:style-name="P42"><text:span text:style-name="T1"><text:s text:c="41"/></text:span><text:span text:style-name="T10"><text:s text:c="2"/>Vježba</text:span><text:span text:style-name="T1"> </text:span><text:span text:style-name="T9">O</text:span><text:span text:style-name="T10">range</text:span><text:span text:style-name="T8">HRM</text:span></text:p>
      <text:p text:style-name="P41"><text:span text:style-name="T8"/></text:p>
      <text:p text:style-name="P41"><text:span text:style-name="T8"/></text:p>
      <text:p text:style-name="P41"><text:span text:style-name="T8"/></text:p>
      <text:p text:style-name="P45"><text:span text:style-name="T3"/></text:p>
      <text:p text:style-name="P46"><text:span text:style-name="T3"><text:s text:c="7"/></text:span></text:p>
      <text:p text:style-name="P46"><text:span text:style-name="T3"><text:s text:c="52"/>Feature: </text:span><text:span text:style-name="T4">Admin</text:span></text:p>
      <text:p text:style-name="P49"><text:span text:style-name="T1"/></text:p>
      <text:p text:style-name="P50"><text:span text:style-name="T1">User story</text:span><text:span text:style-name="T2"> 1</text:span></text:p>
      <text:p text:style-name="P47"><text:span text:style-name="T1"/></text:p>
      <text:p text:style-name="P48"><text:span text:style-name="T1">As an admin, I want to add, edit, delete, and search user accounts in the User Management section under Admin so that I can maintain accurate access control and ensure that employees have the correct roles and permissions. </text:span></text:p>
      <text:p text:style-name="P44"><text:span text:style-name="T16"/></text:p>
      <text:p text:style-name="P44"><text:span text:style-name="T16"/></text:p>
      <text:p text:style-name="P44"><text:span text:style-name="T16"/></text:p>
      <text:p text:style-name="P51"><text:span text:style-name="T26"><text:s/></text:span><text:span text:style-name="T25">TEST CASE 1</text:span></text:p>
      <text:p text:style-name="P41"><text:span text:style-name="T17"/></text:p>
      <text:p text:style-name="P6"><text:span text:style-name="Strong_20_Emphasis"><text:span text:style-name="T22">ID:</text:span></text:span><text:span text:style-name="T12"> ADM03<text:line-break/></text:span><text:span text:style-name="Strong_20_Emphasis"><text:span text:style-name="T22">Title</text:span></text:span><text:span text:style-name="Strong_20_Emphasis"><text:span text:style-name="T12">:</text:span></text:span><text:span text:style-name="T12"> Searching for an existing user in User Management.<text:line-break/></text:span><text:span text:style-name="Strong_20_Emphasis"><text:span text:style-name="T23">Steps:</text:span></text:span></text:p>
      <text:p text:style-name="P11"><text:span text:style-name="T67">1.</text:span>Log in to OrangeHRM as an Admin.</text:p>
      <text:p text:style-name="Text_20_body"><text:span text:style-name="T43">2.</text:span><text:span text:style-name="T41">Open </text:span><text:span text:style-name="Strong_20_Emphasis"><text:span text:style-name="T41">Admin</text:span></text:span><text:span text:style-name="T41"> tab from the left menu.</text:span></text:p>
      <text:p text:style-name="Text_20_body"><text:span text:style-name="T43">3.</text:span><text:span text:style-name="T41">Go to </text:span><text:span text:style-name="Strong_20_Emphasis"><text:span text:style-name="T41">User Management → Users</text:span></text:span><text:span text:style-name="T41">.</text:span></text:p>
      <text:p text:style-name="Text_20_body"><text:span text:style-name="T43">4.</text:span><text:span text:style-name="T41">In the </text:span><text:span text:style-name="Strong_20_Emphasis"><text:span text:style-name="T41">Username</text:span></text:span><text:span text:style-name="T41"> search field, enter an existing username (</text:span><text:span text:style-name="T42">e.g:</text:span><text:span text:style-name="Strong_20_Emphasis"><text:span text:style-name="T41">”</text:span></text:span><text:span text:style-name="Strong_20_Emphasis"><text:span text:style-name="T42">hindd”</text:span></text:span><text:span text:style-name="T41">).</text:span></text:p>
      <text:p text:style-name="Text_20_body"><text:span text:style-name="T43">5.</text:span><text:span text:style-name="T41">Click </text:span><text:span text:style-name="T43">s</text:span><text:span text:style-name="Strong_20_Emphasis"><text:span text:style-name="T41">earch</text:span></text:span><text:span text:style-name="T41">.</text:span></text:p>
      <text:p text:style-name="P11"><text:span text:style-name="T67">6.</text:span>Observe the results table.</text:p>
      <text:p text:style-name="P13"><text:span text:style-name="Strong_20_Emphasis"><text:span text:style-name="T47">Excpe</text:span></text:span><text:span text:style-name="Strong_20_Emphasis"><text:span text:style-name="T47">cted tes</text:span></text:span><text:span text:style-name="Strong_20_Emphasis"><text:span text:style-name="T47">t resul</text:span></text:span><text:span text:style-name="Strong_20_Emphasis"><text:span text:style-name="T47">t</text:span></text:span><text:span text:style-name="Strong_20_Emphasis"><text:span text:style-name="T51">:</text:span></text:span><text:span text:style-name="T41"> </text:span><text:span text:style-name="T43">p</text:span><text:span text:style-name="T41">assed</text:span></text:p>
      <text:p text:style-name="P13"><text:span text:style-name="Strong_20_Emphasis"><text:span text:style-name="T33">Test </text:span></text:span><text:span text:style-name="Strong_20_Emphasis"><text:span text:style-name="T33">pri</text:span></text:span><text:span text:style-name="Strong_20_Emphasis"><text:span text:style-name="T33">orit</text:span></text:span><text:span text:style-name="Strong_20_Emphasis"><text:span text:style-name="T33">y</text:span></text:span><text:span text:style-name="Strong_20_Emphasis"> </text:span><text:span text:style-name="Strong_20_Emphasis"><text:span text:style-name="T41">:</text:span></text:span><text:span text:style-name="T41"> </text:span><text:span text:style-name="T43">m</text:span><text:span text:style-name="T41">edium</text:span></text:p>
      <text:p text:style-name="P13"><text:span text:style-name="T41"/></text:p>
      <text:p text:style-name="P14"><text:span text:style-name="T35"/></text:p>
      <text:p text:style-name="P14"><text:span text:style-name="T35"/></text:p>
      <text:p text:style-name="P14"><text:soft-page-break/><text:span text:style-name="T35"/></text:p>
      <text:p text:style-name="P14"><text:span text:style-name="T35"/></text:p>
      <text:p text:style-name="P23"><text:span text:style-name="T65">TEST CASE 2</text:span></text:p>
      <text:p text:style-name="P15"><text:span text:style-name="Strong_20_Emphasis"><text:span text:style-name="T29">ID</text:span></text:span><text:span text:style-name="Strong_20_Emphasis"><text:span text:style-name="T35">:</text:span></text:span><text:span text:style-name="T35"> ADM04<text:line-break/></text:span><text:span text:style-name="Strong_20_Emphasis"><text:span text:style-name="T29">Title</text:span></text:span><text:span text:style-name="Strong_20_Emphasis"><text:span text:style-name="T35">:</text:span></text:span><text:span text:style-name="T35"> Changing user status from </text:span><text:span text:style-name="T36">e</text:span><text:span text:style-name="T35">nabled to </text:span><text:span text:style-name="T36">d</text:span><text:span text:style-name="T35">isabled<text:line-break/></text:span><text:span text:style-name="Strong_20_Emphasis"><text:span text:style-name="T29">Steps</text:span></text:span><text:span text:style-name="Strong_20_Emphasis"><text:span text:style-name="T35">:</text:span></text:span></text:p>
      <text:p text:style-name="Text_20_body"><text:span text:style-name="T36">1.</text:span><text:span text:style-name="T35">Log in to OrangeHRM as Admin.</text:span></text:p>
      <text:p text:style-name="Text_20_body"><text:span text:style-name="T36">2.</text:span><text:span text:style-name="T35">Open the </text:span><text:span text:style-name="Strong_20_Emphasis"><text:span text:style-name="T35">Admin</text:span></text:span><text:span text:style-name="T35"> tab from the left menu.</text:span></text:p>
      <text:p text:style-name="Text_20_body"><text:span text:style-name="T36">3.</text:span><text:span text:style-name="T35">Navigate to </text:span><text:span text:style-name="Strong_20_Emphasis"><text:span text:style-name="T35">User Management </text:span></text:span><text:span text:style-name="Strong_20_Emphasis"><text:span text:style-name="T36">then U</text:span></text:span><text:span text:style-name="Strong_20_Emphasis"><text:span text:style-name="T35">sers</text:span></text:span><text:span text:style-name="T35">.</text:span></text:p>
      <text:p text:style-name="P10"><text:span text:style-name="T67">4.</text:span>In the search field, enter a valid existing username (e.g., “<text:span text:style-name="T67">hindd</text:span>”).</text:p>
      <text:p text:style-name="Text_20_body"><text:span text:style-name="T36">5.</text:span><text:span text:style-name="T35">Click </text:span><text:span text:style-name="T36">s</text:span><text:span text:style-name="Strong_20_Emphasis"><text:span text:style-name="T35">earch</text:span></text:span><text:span text:style-name="T35">.</text:span></text:p>
      <text:p text:style-name="Text_20_body"><text:span text:style-name="T36">6.</text:span><text:span text:style-name="T35">In the results table, click the </text:span><text:span text:style-name="T36">e</text:span><text:span text:style-name="Strong_20_Emphasis"><text:span text:style-name="T35">dit</text:span></text:span><text:span text:style-name="T35"> (pencil) button for that user.</text:span></text:p>
      <text:p text:style-name="Text_20_body"><text:span text:style-name="T36">7.</text:span><text:span text:style-name="T35">In the </text:span><text:span text:style-name="T36">s</text:span><text:span text:style-name="Strong_20_Emphasis"><text:span text:style-name="T35">tatus</text:span></text:span><text:span text:style-name="T35"> dropdown, change the value from </text:span><text:span text:style-name="T36">e</text:span><text:span text:style-name="Strong_20_Emphasis"><text:span text:style-name="T35">nabled</text:span></text:span><text:span text:style-name="T35"> to </text:span><text:span text:style-name="T36">d</text:span><text:span text:style-name="Strong_20_Emphasis"><text:span text:style-name="T35">isabled</text:span></text:span><text:span text:style-name="T35">.</text:span></text:p>
      <text:p text:style-name="Text_20_body"><text:span text:style-name="T36">8.</text:span><text:span text:style-name="T35">Click </text:span><text:span text:style-name="T36">green s</text:span><text:span text:style-name="Strong_20_Emphasis"><text:span text:style-name="T35">ave </text:span></text:span><text:span text:style-name="Strong_20_Emphasis"><text:span text:style-name="T36">button</text:span></text:span><text:span text:style-name="T35">.</text:span></text:p>
      <text:p text:style-name="P10"><text:span text:style-name="T67">9.</text:span>Return to the <text:span text:style-name="T67">u</text:span>sers list and search for the same username again.</text:p>
      <text:p text:style-name="Text_20_body"><text:span text:style-name="T36">10.</text:span><text:span text:style-name="T35">Verify that the user now appears with </text:span><text:span text:style-name="T36">s</text:span><text:span text:style-name="Strong_20_Emphasis"><text:span text:style-name="T35">tatus </text:span></text:span><text:span text:style-name="Strong_20_Emphasis"><text:span text:style-name="T36">as d</text:span></text:span><text:span text:style-name="Strong_20_Emphasis"><text:span text:style-name="T35">isabled</text:span></text:span><text:span text:style-name="T35">.</text:span></text:p>
      <text:p text:style-name="Text_20_body"><text:span text:style-name="Strong_20_Emphasis"><text:span text:style-name="T35">Expected </text:span></text:span><text:span text:style-name="Strong_20_Emphasis"><text:span text:style-name="T36">t</text:span></text:span><text:span text:style-name="Strong_20_Emphasis"><text:span text:style-name="T35">est </text:span></text:span><text:span text:style-name="Strong_20_Emphasis"><text:span text:style-name="T36">r</text:span></text:span><text:span text:style-name="Strong_20_Emphasis"><text:span text:style-name="T35">esult:</text:span></text:span><text:span text:style-name="T35"> </text:span><text:span text:style-name="T36">p</text:span><text:span text:style-name="T35">assed<text:line-break/></text:span><text:span text:style-name="Strong_20_Emphasis"><text:span text:style-name="T35">Test </text:span></text:span><text:span text:style-name="Strong_20_Emphasis"><text:span text:style-name="T36">p</text:span></text:span><text:span text:style-name="Strong_20_Emphasis"><text:span text:style-name="T35">riority:</text:span></text:span><text:span text:style-name="T35"> </text:span><text:span text:style-name="T36">h</text:span><text:span text:style-name="T35">igh</text:span></text:p>
      <text:p text:style-name="Text_20_body"><text:span text:style-name="T35"/></text:p>
      <text:p text:style-name="Text_20_body"><text:span text:style-name="T35"/></text:p>
      <text:p text:style-name="P21"><text:span text:style-name="T65">Bug report</text:span></text:p>
      <text:p text:style-name="P20"><text:span text:style-name="Strong_20_Emphasis"><text:span text:style-name="T31">Title</text:span></text:span><text:span text:style-name="Strong_20_Emphasis"><text:span text:style-name="T40">:</text:span></text:span><text:span text:style-name="T40"> Language partially switches to Chinese after clicking in the Admin section</text:span></text:p>
      <text:p text:style-name="P25"><text:span text:style-name="Strong_20_Emphasis"><text:span text:style-name="T32">Description</text:span></text:span><text:span text:style-name="Strong_20_Emphasis"><text:span text:style-name="T41">:</text:span></text:span><text:span text:style-name="T41"> When </text:span><text:span text:style-name="T44">c</text:span><text:span text:style-name="T41">licking</text:span><text:span text:style-name="T44">, </text:span><text:span text:style-name="T41">selecting options, </text:span><text:span text:style-name="T44">generally using application </text:span><text:span text:style-name="T41">in the Admin section, some interface elements switch </text:span><text:span text:style-name="T44">to</text:span><text:span text:style-name="T41"> Chinese language, while the rest remain in English. </text:span></text:p>
      <text:p text:style-name="P25"><text:span text:style-name="Strong_20_Emphasis"><text:span text:style-name="T32">Steps to Reproduce</text:span></text:span><text:span text:style-name="Strong_20_Emphasis"><text:span text:style-name="T41">:</text:span></text:span></text:p>
      <text:p text:style-name="Text_20_body"><text:span text:style-name="T41">-Open the website: </text:span><text:a xlink:type="simple" xlink:href="https://opensource-demo.orangehrmlive.com/" office:target-frame-name="_new" xlink:show="replace" text:style-name="Internet_20_link" text:visited-style-name="Visited_20_Internet_20_Link"><text:span text:style-name="T41">https://opensource-demo.orangehrmlive.com</text:span></text:a></text:p>
      <text:p text:style-name="P11">-Log in as Admin</text:p>
      <text:p text:style-name="Text_20_body"><text:span text:style-name="T41">-Click on the </text:span><text:span text:style-name="Strong_20_Emphasis"><text:span text:style-name="T41">Admin</text:span></text:span><text:span text:style-name="T41"> section in the left menu</text:span></text:p>
      <text:p text:style-name="Text_20_body"><text:span text:style-name="T41">-Perform a </text:span><text:span text:style-name="Strong_20_Emphasis"><text:span text:style-name="T41">long click</text:span></text:span><text:span text:style-name="T41"> or hold the mouse on options within the Admin menu</text:span></text:p>
      <text:p text:style-name="P11"><text:soft-page-break/>-Observe the labels and table text</text:p>
      <text:p text:style-name="Text_20_body"><text:span text:style-name="Strong_20_Emphasis"><text:span text:style-name="T32">Expected </text:span></text:span><text:span text:style-name="Strong_20_Emphasis"><text:span text:style-name="T33"><text:s/>r</text:span></text:span><text:span text:style-name="Strong_20_Emphasis"><text:span text:style-name="T32">esult</text:span></text:span><text:span text:style-name="Strong_20_Emphasis"><text:span text:style-name="T41">:</text:span></text:span><text:span text:style-name="T41"> All interface elements should <text:s/>remain in English with no unexpected language changes.</text:span></text:p>
      <text:p text:style-name="Text_20_body"><text:span text:style-name="Strong_20_Emphasis"><text:span text:style-name="T32">Actual Result:</text:span></text:span><text:span text:style-name="T41"> Part of the interface switches to Chinese, while the rest stays in English.</text:span></text:p>
      <text:p text:style-name="Text_20_body"><text:span text:style-name="Strong_20_Emphasis"><text:span text:style-name="T32">Severity</text:span></text:span><text:span text:style-name="Strong_20_Emphasis"><text:span text:style-name="T41">:</text:span></text:span><text:span text:style-name="T41"> </text:span><text:span text:style-name="T46">major</text:span></text:p>
      <text:p text:style-name="Text_20_body"><text:span text:style-name="Strong_20_Emphasis"><text:span text:style-name="T32">Priority</text:span></text:span><text:span text:style-name="Strong_20_Emphasis"><text:span text:style-name="T41">:</text:span></text:span><text:span text:style-name="T41"> </text:span><text:span text:style-name="T46">medium</text:span></text:p>
      <text:p text:style-name="Text_20_body"><text:span text:style-name="Strong_20_Emphasis"><text:span text:style-name="T32">Attachment</text:span></text:span><text:span text:style-name="Strong_20_Emphasis"><text:span text:style-name="T41">: </text:span></text:span><text:span text:style-name="Strong_20_Emphasis"><text:span text:style-name="T44">screenshot <text:s/></text:span></text:span></text:p>
      <text:p text:style-name="Text_20_body"><draw:frame draw:style-name="fr1" draw:name="Image1" text:anchor-type="paragraph" svg:x="-0.377cm" svg:y="0cm" svg:width="18.348cm" svg:height="8.317cm" draw:z-index="0"><draw:image xlink:href="Pictures/100002010000077600000362EA93AFFAF1FE15AC.png" xlink:type="simple" xlink:show="embed" xlink:actuate="onLoad" loext:mime-type="image/png"/></draw:frame><text:span text:style-name="Strong_20_Emphasis"><text:span text:style-name="T44"/></text:span></text:p>
      <text:p text:style-name="P14"><text:span text:style-name="T35"/></text:p>
      <text:p text:style-name="P24"><text:span text:style-name="T65">TEST CASE 3</text:span></text:p>
      <text:p text:style-name="P24"><text:span text:style-name="Strong_20_Emphasis"><text:span text:style-name="T31">ID</text:span></text:span><text:span text:style-name="Strong_20_Emphasis"><text:span text:style-name="T40">:</text:span></text:span><text:span text:style-name="T40"> ADM15 </text:span></text:p>
      <text:p text:style-name="P27"><text:span text:style-name="Strong_20_Emphasis"><text:span text:style-name="T60">Title</text:span></text:span><text:span text:style-name="Strong_20_Emphasis"><text:span text:style-name="T50">:</text:span></text:span><text:span text:style-name="T50"> Attempt to change a user’s username to an already existing username and verify validation message</text:span></text:p>
      <text:p text:style-name="P27"><text:span text:style-name="Strong_20_Emphasis"><text:span text:style-name="T61">Preconditions</text:span></text:span><text:span text:style-name="Strong_20_Emphasis"><text:span text:style-name="T53">:</text:span></text:span></text:p>
      <text:p text:style-name="P27"><text:span text:style-name="Strong_20_Emphasis"><text:span text:style-name="T53">-</text:span></text:span><text:span text:style-name="T53">Admin has valid login credentials.</text:span></text:p>
      <text:p text:style-name="P26"><text:span text:style-name="T53">-In the system already exist at least two different user account</text:span><text:span text:style-name="T54">s.</text:span></text:p>
      <text:p text:style-name="P27"><text:span text:style-name="T53">-Both users are visible under </text:span><text:span text:style-name="Strong_20_Emphasis"><text:span text:style-name="T53">Admin, User Managemen</text:span></text:span><text:span text:style-name="Strong_20_Emphasis"><text:span text:style-name="T54">t,</text:span></text:span><text:span text:style-name="Strong_20_Emphasis"><text:span text:style-name="T53"> Users.</text:span></text:span></text:p>
      <text:p text:style-name="P27"><text:span text:style-name="Strong_20_Emphasis"><text:span text:style-name="T61">Test data</text:span></text:span><text:span text:style-name="Strong_20_Emphasis"><text:span text:style-name="T53">:</text:span></text:span></text:p>
      <text:p text:style-name="P27"><text:span text:style-name="T53">-Username to edit: </text:span><text:span text:style-name="Source_20_Text"><text:span text:style-name="T56">username101</text:span></text:span></text:p>
      <text:p text:style-name="P27"><text:soft-page-break/><text:span text:style-name="T53">-New (duplicate) username to assign: </text:span><text:span text:style-name="Source_20_Text"><text:span text:style-name="T55">FMLName</text:span></text:span></text:p>
      <text:p text:style-name="P27"><text:span text:style-name="Strong_20_Emphasis"><text:span text:style-name="T61">Steps</text:span></text:span><text:span text:style-name="Strong_20_Emphasis"><text:span text:style-name="T53">:</text:span></text:span></text:p>
      <text:p text:style-name="P12"><text:span text:style-name="T69">1.</text:span>Log in to OrangeHRM as Admin.</text:p>
      <text:p text:style-name="P26"><text:span text:style-name="T54">2.</text:span><text:span text:style-name="T53">Open the </text:span><text:span text:style-name="Strong_20_Emphasis"><text:span text:style-name="T53">Admin</text:span></text:span><text:span text:style-name="T53"> tab from the left </text:span><text:span text:style-name="T54">s</text:span><text:span text:style-name="T53">ide menu.</text:span></text:p>
      <text:p text:style-name="P26"><text:span text:style-name="T54">3.</text:span><text:span text:style-name="T53">Navigate to </text:span><text:span text:style-name="Strong_20_Emphasis"><text:span text:style-name="T53">User Managemen</text:span></text:span><text:span text:style-name="Strong_20_Emphasis"><text:span text:style-name="T56">t,</text:span></text:span><text:span text:style-name="Strong_20_Emphasis"><text:span text:style-name="T53"> Users</text:span></text:span><text:span text:style-name="T53">.</text:span></text:p>
      <text:p text:style-name="P26"><text:span text:style-name="T54">4.</text:span><text:span text:style-name="T53">In the </text:span><text:span text:style-name="T54">u</text:span><text:span text:style-name="T53">sername search field enter </text:span><text:span text:style-name="Source_20_Text"><text:span text:style-name="T53">“</text:span></text:span><text:span text:style-name="Source_20_Text"><text:span text:style-name="T56">username101”</text:span></text:span><text:span text:style-name="T53">.</text:span></text:p>
      <text:p text:style-name="P26"><text:span text:style-name="T54">5.</text:span><text:span text:style-name="T53">Click </text:span><text:span text:style-name="T54">s</text:span><text:span text:style-name="Strong_20_Emphasis"><text:span text:style-name="T53">earch</text:span></text:span><text:span text:style-name="T53">.</text:span></text:p>
      <text:p text:style-name="P26"><text:span text:style-name="T54">6.</text:span><text:span text:style-name="T53">In the results table click the </text:span><text:span text:style-name="Strong_20_Emphasis"><text:span text:style-name="T53">edit (pencil)</text:span></text:span><text:span text:style-name="T53"> button for user </text:span><text:span text:style-name="Source_20_Text"><text:span text:style-name="T53">“</text:span></text:span><text:span text:style-name="Source_20_Text"><text:span text:style-name="T56">username101”</text:span></text:span><text:span text:style-name="T53">.</text:span></text:p>
      <text:p text:style-name="P12"><text:span text:style-name="T69">7.</text:span>In the Username field delete the current <text:span text:style-name="T70">username </text:span></text:p>
      <text:p text:style-name="P28"><text:span text:style-name="T54">8.</text:span><text:span text:style-name="T53">Enter a username that already exists in the system, e.g:</text:span><text:span text:style-name="Source_20_Text"><text:span text:style-name="T55">FMLName.</text:span></text:span></text:p>
      <text:p text:style-name="P26"><text:span text:style-name="T54">9.</text:span><text:span text:style-name="T53">Click the </text:span><text:span text:style-name="Strong_20_Emphasis"><text:span text:style-name="T53">green </text:span></text:span><text:span text:style-name="Strong_20_Emphasis"><text:span text:style-name="T54">s</text:span></text:span><text:span text:style-name="Strong_20_Emphasis"><text:span text:style-name="T53">ave</text:span></text:span><text:span text:style-name="T53"> button.</text:span></text:p>
      <text:p text:style-name="P12"><text:span text:style-name="T69">10.</text:span>Observe the page for validation errors.</text:p>
      <text:p text:style-name="P26"><text:span text:style-name="T54">11.</text:span><text:span text:style-name="T53">Return to the Users list and search for “</text:span><text:span text:style-name="T57">username101</text:span><text:span text:style-name="Source_20_Text"><text:span text:style-name="T53">”</text:span></text:span><text:span text:style-name="T53"> again.</text:span></text:p>
      <text:p text:style-name="P26"><text:span text:style-name="T54">12.</text:span><text:span text:style-name="T53">Verify that the user “</text:span><text:span text:style-name="T57">username101</text:span><text:span text:style-name="Source_20_Text"><text:span text:style-name="T53">”</text:span></text:span><text:span text:style-name="T53"> still exists with the original username (no changes applied).</text:span></text:p>
      <text:h text:style-name="P1" text:outline-level="3"><text:span text:style-name="Strong_20_Emphasis"><text:span text:style-name="T61">Expected </text:span></text:span><text:span text:style-name="Strong_20_Emphasis"><text:span text:style-name="T62">test </text:span></text:span><text:span text:style-name="Strong_20_Emphasis"><text:span text:style-name="T61">result</text:span></text:span><text:span text:style-name="Strong_20_Emphasis"><text:span text:style-name="T53">:</text:span></text:span></text:h>
      <text:p text:style-name="P26"><text:span text:style-name="T53">System displays a clear validation error message indicating that the username already exists (e.g., </text:span><text:span text:style-name="Strong_20_Emphasis"><text:span text:style-name="T53">“Already exists”</text:span></text:span><text:span text:style-name="T53">).</text:span></text:p>
      <text:p text:style-name="P12">User cannot be saved with a duplicate username.</text:p>
      <text:p text:style-name="P26"><text:span text:style-name="T53">No changes are made to the original user (“</text:span><text:span text:style-name="Source_20_Text"><text:span text:style-name="T58">username101”</text:span></text:span><text:span text:style-name="T53">).</text:span></text:p>
      <text:h text:style-name="P2" text:outline-level="3"><text:span text:style-name="Strong_20_Emphasis"><text:span text:style-name="T61">Actual result</text:span></text:span><text:span text:style-name="Strong_20_Emphasis"><text:span text:style-name="T53">:A red pop-up error message appears saying "Error: Record Not Found", and the system does not allow changing the username to one that already exists. No updates are saved. </text:span></text:span></text:h>
      <text:h text:style-name="P2" text:outline-level="3"><text:span text:style-name="Strong_20_Emphasis"><text:span text:style-name="T61">Status</text:span></text:span><text:span text:style-name="Strong_20_Emphasis"><text:span text:style-name="T53">:</text:span></text:span><text:span text:style-name="T53"> Pass </text:span></text:h>
      <text:h text:style-name="P1" text:outline-level="3"><text:span text:style-name="Strong_20_Emphasis"><text:span text:style-name="T61">Priority</text:span></text:span><text:span text:style-name="Strong_20_Emphasis"><text:span text:style-name="T53">:</text:span></text:span><text:span text:style-name="T53"> </text:span><text:span text:style-name="T59">Medium </text:span></text:h>
      <text:p text:style-name="P9"><text:span text:style-name="T66"/></text:p>
      <text:p text:style-name="P24"><text:span text:style-name="T65"/></text:p>
      <text:p text:style-name="P22"><text:span text:style-name="T35"/></text:p>
      <text:p text:style-name="P22"><text:span text:style-name="T35"/></text:p>
      <text:p text:style-name="P22"><text:soft-page-break/><text:span text:style-name="T35">Bug report</text:span></text:p>
      <text:p text:style-name="P29"><text:span text:style-name="T71">Title:</text:span><text:span text:style-name="T72"> </text:span><text:span text:style-name="T35">System shows “Error: Record Not Found” and prevents updating username even when the new username is unique.</text:span></text:p>
      <text:p text:style-name="P29"><text:span text:style-name="T30">Description: </text:span><text:span text:style-name="T28">When attempting to edit an existing user account and change the username, the system displays a red error pop-up </text:span><text:span text:style-name="Strong_20_Emphasis"><text:span text:style-name="T28">“</text:span></text:span><text:span text:style-name="Strong_20_Emphasis"><text:span text:style-name="T35">Error: Record Not Found”</text:span></text:span><text:span text:style-name="T35"> and does not allow saving the changes.<text:line-break/>The issue occurs </text:span><text:span text:style-name="Strong_20_Emphasis"><text:span text:style-name="T35">even when the new username does not exist in the system</text:span></text:span><text:span text:style-name="T35"> (e.g., </text:span><text:span text:style-name="Source_20_Text"><text:span text:style-name="T37">elma73</text:span></text:span><text:span text:style-name="T35">), meaning the system fails to update valid, unique usernames.</text:span></text:p>
      <text:p text:style-name="Text_20_body"><text:span text:style-name="T35">The bug occurs both when entering an </text:span><text:span text:style-name="Strong_20_Emphasis"><text:span text:style-name="T35">already existing username</text:span></text:span><text:span text:style-name="T35"> and when entering a </text:span><text:span text:style-name="Strong_20_Emphasis"><text:span text:style-name="T35">new unique username</text:span></text:span><text:span text:style-name="T35">, meaning validation is failing incorrectly.</text:span></text:p>
      <text:p text:style-name="P10">This blocks one of the core admin functions: editing user accounts.</text:p>
      <text:p text:style-name="P29"><text:span text:style-name="Strong_20_Emphasis"><text:span text:style-name="T34">Steps to Reproduce: </text:span></text:span></text:p>
      <text:p text:style-name="P29"><text:span text:style-name="Strong_20_Emphasis"><text:span text:style-name="T45">-</text:span></text:span><text:span text:style-name="Strong_20_Emphasis"><text:span text:style-name="T41">Log in to OrangeHRM as Admin.</text:span></text:span></text:p>
      <text:p text:style-name="Text_20_body"><text:span text:style-name="T35">-Open </text:span><text:span text:style-name="Strong_20_Emphasis"><text:span text:style-name="T35">Admin</text:span></text:span><text:span text:style-name="T35"> tab from the left menu.</text:span></text:p>
      <text:p text:style-name="Text_20_body"><text:span text:style-name="T35">-Navigate to </text:span><text:span text:style-name="Strong_20_Emphasis"><text:span text:style-name="T35">User Management </text:span></text:span><text:span text:style-name="Strong_20_Emphasis"><text:span text:style-name="T37">then</text:span></text:span><text:span text:style-name="Strong_20_Emphasis"><text:span text:style-name="T35"> Users</text:span></text:span><text:span text:style-name="T35">.</text:span></text:p>
      <text:p text:style-name="Text_20_body"><text:span text:style-name="T35">-In the Username search field enter an existing user (e.g., </text:span><text:span text:style-name="Source_20_Text"><text:span text:style-name="T35">hindd</text:span></text:span><text:span text:style-name="T35">).</text:span></text:p>
      <text:p text:style-name="Text_20_body"><text:span text:style-name="T35">-Click </text:span><text:span text:style-name="Strong_20_Emphasis"><text:span text:style-name="T35">Search</text:span></text:span><text:span text:style-name="T35">.</text:span></text:p>
      <text:p text:style-name="Text_20_body"><text:span text:style-name="T35">-In the results table click the </text:span><text:span text:style-name="Strong_20_Emphasis"><text:span text:style-name="T35">edit (pencil)</text:span></text:span><text:span text:style-name="T35"> button.</text:span></text:p>
      <text:p text:style-name="P10">-In the Username field delete the current username.</text:p>
      <text:p text:style-name="Text_20_body"><text:span text:style-name="T35">-Enter a </text:span><text:span text:style-name="Strong_20_Emphasis"><text:span text:style-name="T35">new valid and unique username</text:span></text:span><text:span text:style-name="T35">, e.g., </text:span><text:span text:style-name="Source_20_Text"><text:span text:style-name="T35">elma73</text:span></text:span><text:span text:style-name="T35">.</text:span></text:p>
      <text:p text:style-name="Text_20_body"><text:span text:style-name="T35">-Click the </text:span><text:span text:style-name="Strong_20_Emphasis"><text:span text:style-name="T35">green Save</text:span></text:span><text:span text:style-name="T35"> button.</text:span></text:p>
      <text:p text:style-name="P33"><text:span text:style-name="Strong_20_Emphasis"><text:span text:style-name="T32">Expected</text:span></text:span><text:span text:style-name="Strong_20_Emphasis"><text:span text:style-name="T33"> r</text:span></text:span><text:span text:style-name="Strong_20_Emphasis"><text:span text:style-name="T32">esult: </text:span></text:span><text:span text:style-name="Strong_20_Emphasis"><text:span text:style-name="T41">System should allow saving a new username as long as it is unique and valid. </text:span></text:span><text:span text:style-name="T35">A success message should appear. User should be updated with the new username (e.g., </text:span><text:span text:style-name="Source_20_Text"><text:span text:style-name="T35">elma73</text:span></text:span><text:span text:style-name="T35">).</text:span></text:p>
      <text:p text:style-name="P16"><text:span text:style-name="T28">Severity: </text:span><text:span text:style-name="T35">minor</text:span></text:p>
      <text:p text:style-name="P17"><text:span text:style-name="T28">Priority: </text:span><text:span text:style-name="T35">medium</text:span></text:p>
      <text:p text:style-name="P17"><text:span text:style-name="T28">Attachment: </text:span><text:span text:style-name="T35">screenshot</text:span></text:p>
      <text:p text:style-name="P33"><text:span text:style-name="T35"/></text:p>
      <text:p text:style-name="P33"><text:span text:style-name="Strong_20_Emphasis"><text:span text:style-name="T41"/></text:span></text:p>
      <text:p text:style-name="Text_20_body"><text:span text:style-name="T35"/></text:p>
      <text:p text:style-name="P30"><draw:frame draw:style-name="fr1" draw:name="Image2" text:anchor-type="paragraph" svg:x="-0.612cm" svg:y="-0.748cm" svg:width="18.459cm" svg:height="10.5cm" draw:z-index="1"><draw:image xlink:href="Pictures/10000201000007710000036D9EFB8B7AD95AAEBB.png" xlink:type="simple" xlink:show="embed" xlink:actuate="onLoad" loext:mime-type="image/png"/></draw:frame><text:soft-page-break/><text:span text:style-name="Strong_20_Emphasis"><text:span text:style-name="T32"/></text:span></text:p>
      <text:p text:style-name="P30"><text:span text:style-name="Strong_20_Emphasis"><text:span text:style-name="T32"/></text:span></text:p>
      <text:p text:style-name="P31"><text:span text:style-name="Strong_20_Emphasis"><text:span text:style-name="T73">User story 2</text:span></text:span></text:p>
      <text:p text:style-name="P31"><text:span text:style-name="Strong_20_Emphasis"><text:span text:style-name="T13"/></text:span></text:p>
      <text:p text:style-name="P31"><text:span text:style-name="Strong_20_Emphasis"><text:span text:style-name="T13">As an admin, I want to manage all job settings in the Job sectio</text:span></text:span><text:span text:style-name="Strong_20_Emphasis"><text:span text:style-name="T14">n:</text:span></text:span><text:span text:style-name="Strong_20_Emphasis"><text:span text:style-name="T13"> job titles, pay grades, employment statuses, job categories, and work shifts — so that I can maintain accurate organizational structure, define compensation levels, </text:span></text:span><text:span text:style-name="Strong_20_Emphasis"><text:span text:style-name="T14">and know</text:span></text:span><text:span text:style-name="Strong_20_Emphasis"><text:span text:style-name="T13"> that employee records are classified correctly across the system. </text:span></text:span></text:p>
      <text:p text:style-name="P31"><text:span text:style-name="Strong_20_Emphasis"><text:span text:style-name="T13"/></text:span></text:p>
      <text:p text:style-name="P32"><text:span text:style-name="Strong_20_Emphasis"><text:span text:style-name="T21">TEST CASE 4</text:span></text:span></text:p>
      <text:p text:style-name="P31"><text:span text:style-name="Strong_20_Emphasis"><text:span text:style-name="T18">ID:</text:span></text:span><text:span text:style-name="Strong_20_Emphasis"><text:span text:style-name="T13"> JOB01 </text:span></text:span></text:p>
      <text:p text:style-name="P34"><text:span text:style-name="Strong_20_Emphasis"><text:span text:style-name="T24">Title: </text:span></text:span><text:span text:style-name="Strong_20_Emphasis"><text:span text:style-name="T15">Adding a job specification document to a job title</text:span></text:span></text:p>
      <text:h text:style-name="P4" text:outline-level="3"><text:span text:style-name="Strong_20_Emphasis"><text:span text:style-name="T19">Preconditions:</text:span></text:span></text:h>
      <text:p text:style-name="P8">-Admin has valid login credentials.</text:p>
      <text:p text:style-name="P35">Admin is on the OrangeHRM dashboard, <text:span text:style-name="T74">on Admin, under Job-Job Titles</text:span></text:p>
      <text:p text:style-name="P8">-A valid document (e.g., PDF, DOCX) is available on the local device for upload.</text:p>
      <text:h text:style-name="P4" text:outline-level="3"><text:soft-page-break/><text:span text:style-name="Strong_20_Emphasis"><text:span text:style-name="T15"/></text:span></text:h>
      <text:h text:style-name="P4" text:outline-level="3"><text:span text:style-name="Strong_20_Emphasis"><text:span text:style-name="T19">Test data:</text:span></text:span></text:h>
      <text:p text:style-name="P36"><text:span text:style-name="T28">Job Title: Account Assistant</text:span></text:p>
      <text:p text:style-name="P36"><text:span text:style-name="T28">Job Specification File:”file-example_PDF_1MB” or any supported file type</text:span></text:p>
      <text:h text:style-name="P5" text:outline-level="3"><text:span text:style-name="Strong_20_Emphasis"><text:span text:style-name="T29">Steps:</text:span></text:span></text:h>
      <text:p text:style-name="P10"><text:span text:style-name="T74">1.</text:span>Log in to OrangeHRM as Admin.</text:p>
      <text:p text:style-name="Text_20_body"><text:span text:style-name="T38">2.</text:span><text:span text:style-name="T35">Open the </text:span><text:span text:style-name="Strong_20_Emphasis"><text:span text:style-name="T35">Admin</text:span></text:span><text:span text:style-name="T35"> tab from the left menu.</text:span></text:p>
      <text:p text:style-name="Text_20_body"><text:span text:style-name="T38">3.</text:span><text:span text:style-name="T35">Navigate to </text:span><text:span text:style-name="Strong_20_Emphasis"><text:span text:style-name="T35">Job </text:span></text:span><text:span text:style-name="Strong_20_Emphasis"><text:span text:style-name="T38">then </text:span></text:span><text:span text:style-name="Strong_20_Emphasis"><text:span text:style-name="T35">Job Titles</text:span></text:span><text:span text:style-name="T35">.</text:span></text:p>
      <text:p text:style-name="Text_20_body"><text:span text:style-name="T39">4.</text:span><text:span text:style-name="T35">In the job titles list, locate </text:span><text:span text:style-name="Strong_20_Emphasis"><text:span text:style-name="T35">Account Assistant</text:span></text:span><text:span text:style-name="T35">.</text:span></text:p>
      <text:p text:style-name="Text_20_body"><text:span text:style-name="T39">5.</text:span><text:span text:style-name="T35">Click the </text:span><text:span text:style-name="Strong_20_Emphasis"><text:span text:style-name="T35">edit (pencil)</text:span></text:span><text:span text:style-name="T35"> button next to </text:span><text:span text:style-name="Strong_20_Emphasis"><text:span text:style-name="T35">Account Assistant</text:span></text:span><text:span text:style-name="T35">.</text:span></text:p>
      <text:p text:style-name="Text_20_body"><text:span text:style-name="T39">6.</text:span><text:span text:style-name="T35">In the </text:span><text:span text:style-name="Strong_20_Emphasis"><text:span text:style-name="T35">Job Specification</text:span></text:span><text:span text:style-name="T35"> section, click </text:span><text:span text:style-name="Strong_20_Emphasis"><text:span text:style-name="T35">Browse</text:span></text:span><text:span text:style-name="T35"> (Choose File).</text:span></text:p>
      <text:p text:style-name="P37"><text:span text:style-name="T39">7.</text:span><text:span text:style-name="T35">Select a valid document from your computer (“file-example_PDF_1MB”).</text:span></text:p>
      <text:p text:style-name="P10"><text:span text:style-name="T75">8.</text:span>Verify that the file name appears next to the upload field.</text:p>
      <text:p text:style-name="Text_20_body"><text:span text:style-name="T39">9.</text:span><text:span text:style-name="T35">Click the </text:span><text:span text:style-name="Strong_20_Emphasis"><text:span text:style-name="T35">Save</text:span></text:span><text:span text:style-name="T35"> button.</text:span></text:p>
      <text:p text:style-name="Text_20_body"><text:span text:style-name="T39">10.</text:span><text:span text:style-name="T35">Return to the Job Titles list and search for </text:span><text:span text:style-name="Strong_20_Emphasis"><text:span text:style-name="T35">Account Assistant</text:span></text:span><text:span text:style-name="T35"> again.</text:span></text:p>
      <text:p text:style-name="Text_20_body"><text:span text:style-name="T39">11.</text:span><text:span text:style-name="T35">Open the job title using the </text:span><text:span text:style-name="Strong_20_Emphasis"><text:span text:style-name="T35">edit (pencil)</text:span></text:span><text:span text:style-name="T35"> button.</text:span></text:p>
      <text:p text:style-name="Text_20_body"><text:span text:style-name="T39">12.</text:span><text:span text:style-name="T35">Verify that the uploaded document is visible under </text:span><text:span text:style-name="Strong_20_Emphasis"><text:span text:style-name="T35">Job Specification</text:span></text:span><text:span text:style-name="T35">, with </text:span><text:span text:style-name="T39">a icon for d</text:span><text:span text:style-name="Strong_20_Emphasis"><text:span text:style-name="T35">ownload</text:span></text:span><text:span text:style-name="T35"> option </text:span><text:span text:style-name="T39">and 3 options for: </text:span><text:span text:style-name="T76">Keep Current,</text:span><text:span text:style-name="T92">Delete Current </text:span><text:span text:style-name="T93">and </text:span><text:span text:style-name="T92">Replace Current. </text:span></text:p>
      <text:h text:style-name="P3" text:outline-level="3"><text:span text:style-name="Strong_20_Emphasis"><text:span text:style-name="T79">Expected test result: </text:span></text:span></text:h>
      <text:h text:style-name="P3" text:outline-level="3"><text:span text:style-name="Strong_20_Emphasis"><text:span text:style-name="T80">System successfully uploads and attaches the job specification document. </text:span></text:span><text:span text:style-name="T35">Changes are saved without errors. The uploaded file appears correctly under Job Specification.</text:span></text:h>
      <text:p text:style-name="Text_20_body"><text:span text:style-name="T35">A Download icon/option confirms the file is stored. </text:span><text:span text:style-name="T5">A green pop-up notification appears in the bottom-left corner displaying </text:span><text:span text:style-name="Strong_20_Emphasis"><text:span text:style-name="T5">“Success! Successfully updated”.</text:span></text:span></text:p>
      <text:p text:style-name="P38"><text:span text:style-name="T29">Status</text:span><text:span text:style-name="T35">: passed</text:span></text:p>
      <text:p text:style-name="P18"><text:span text:style-name="T28">Priority: </text:span><text:span text:style-name="T35">medium </text:span></text:p>
      <text:p text:style-name="Text_20_body"><text:span text:style-name="T35"/></text:p>
      <text:p text:style-name="P19"><text:span text:style-name="T28"/></text:p>
      <text:p text:style-name="P19"><text:span text:style-name="T28"/></text:p>
      <text:p text:style-name="P19"><text:soft-page-break/><text:span text:style-name="T28">TEST CASE 5</text:span></text:p>
      <text:p text:style-name="P19"><text:span text:style-name="T28"/></text:p>
      <text:p text:style-name="P19"><text:span text:style-name="T28"/></text:p>
      <text:p text:style-name="P34"><text:span text:style-name="Strong_20_Emphasis"><text:span text:style-name="T15"/></text:span></text:p>
      <text:p text:style-name="P31"><text:span text:style-name="Strong_20_Emphasis"><text:span text:style-name="T73"/></text:span></text:p>
      <text:p text:style-name="P41"><text:span text:style-name="T17"/></text:p>
      <text:p text:style-name="P43"><text:span text:style-name="T16"/></text:p>
      <text:p text:style-name="P7"><text:span text:style-name="T20"><text:line-break/></text:span></text:p>
      <text:p text:style-name="P43"><text:span text:style-name="T16"/></text:p>
      <text:p text:style-name="P41"><text:span text:style-name="T11"/></text:p>
      <text:p text:style-name="P41"><text:span text:style-name="T8"/></text:p>
      <text:p text:style-name="P40"><text:span text:style-name="T8"/></text:p>
      <text:p text:style-name="P39"><text:span text:style-name="T1"/></text:p>
      <text:p text:style-name="P39"><text:span text:style-name="T1"/></text:p>
      <text:p text:style-name="P39"><text:span text:style-name="T1"/></text:p>
      <text:p text:style-name="P39"><text:span text:style-name="T1"/></text:p>
      <text:p text:style-name="P39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bs" fo:country="B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s" fo:country="B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1-23T12:32:14.566000000</meta:creation-date>
    <dc:date>2025-11-24T00:27:49.950000000</dc:date>
    <meta:editing-duration>PT31M54S</meta:editing-duration>
    <meta:editing-cycles>4</meta:editing-cycles>
    <meta:generator>Neat_Office/6.2.8.2$Windows_x86 LibreOffice_project/</meta:generator>
    <meta:document-statistic meta:table-count="0" meta:image-count="2" meta:object-count="0" meta:page-count="8" meta:paragraph-count="125" meta:word-count="1041" meta:character-count="6848" meta:non-whitespace-character-count="5680"/>
  </office:meta>
</office:document-meta>
</file>