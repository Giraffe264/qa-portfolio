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7600000362EA93AFFAF1FE15AC.png" manifest:media-type="image/png"/>
  <manifest:file-entry manifest:full-path="Pictures/10000201000007710000036D9EFB8B7AD95AAE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</style:style>
    <style:style style:name="P2" style:family="paragraph" style:parent-style-name="Heading_20_3">
      <style:paragraph-properties fo:text-align="start" style:justify-single-word="false"/>
      <style:text-properties officeooo:paragraph-rsid="00222070"/>
    </style:style>
    <style:style style:name="P3" style:family="paragraph" style:parent-style-name="Heading_20_3">
      <style:paragraph-properties fo:text-align="start" style:justify-single-word="false"/>
      <style:text-properties officeooo:paragraph-rsid="0031dcab"/>
    </style:style>
    <style:style style:name="P4" style:family="paragraph" style:parent-style-name="Heading_20_3">
      <style:text-properties officeooo:paragraph-rsid="002f793d"/>
    </style:style>
    <style:style style:name="P5" style:family="paragraph" style:parent-style-name="Heading_20_3">
      <style:text-properties officeooo:paragraph-rsid="0030fd4d"/>
    </style:style>
    <style:style style:name="P6" style:family="paragraph" style:parent-style-name="Text_20_body">
      <style:text-properties style:text-underline-style="none" officeooo:rsid="00179d18" officeooo:paragraph-rsid="00179d18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Text_20_body">
      <style:text-properties style:font-name="Times New Roman" fo:font-size="14pt" fo:font-weight="normal" fo:background-color="transparent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Text_20_body">
      <style:text-properties officeooo:paragraph-rsid="001eb9bf"/>
    </style:style>
    <style:style style:name="P12" style:family="paragraph" style:parent-style-name="Text_20_body">
      <style:text-properties officeooo:rsid="001ecbbf" officeooo:paragraph-rsid="001ecbbf" fo:background-color="transparent"/>
    </style:style>
    <style:style style:name="P13" style:family="paragraph" style:parent-style-name="Text_20_body">
      <style:text-properties fo:font-weight="bold" officeooo:rsid="0025b381" officeooo:paragraph-rsid="0025b381" style:font-weight-asian="bold" style:font-weight-complex="bold"/>
    </style:style>
    <style:style style:name="P14" style:family="paragraph" style:parent-style-name="Text_20_body">
      <style:text-properties fo:font-weight="bold" officeooo:rsid="0025b381" officeooo:paragraph-rsid="00279fde" style:font-weight-asian="bold" style:font-weight-complex="bold"/>
    </style:style>
    <style:style style:name="P15" style:family="paragraph" style:parent-style-name="Text_20_body">
      <style:text-properties fo:font-weight="bold" officeooo:rsid="00332336" officeooo:paragraph-rsid="00332336" style:font-weight-asian="bold" style:font-weight-complex="bold"/>
    </style:style>
    <style:style style:name="P16" style:family="paragraph" style:parent-style-name="Text_20_body">
      <style:text-properties officeooo:rsid="00206801" officeooo:paragraph-rsid="00206801" fo:background-color="#ff4000"/>
    </style:style>
    <style:style style:name="P17" style:family="paragraph" style:parent-style-name="Text_20_body">
      <style:text-properties fo:font-size="15pt" officeooo:rsid="00212307" officeooo:paragraph-rsid="00212307" fo:background-color="#ffff00" style:font-size-asian="15pt" style:font-size-complex="15pt"/>
    </style:style>
    <style:style style:name="P18" style:family="paragraph" style:parent-style-name="Text_20_body">
      <style:text-properties officeooo:paragraph-rsid="00206801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paragraph-properties fo:text-align="start" style:justify-single-word="false"/>
      <style:text-properties officeooo:paragraph-rsid="00222070"/>
    </style:style>
    <style:style style:name="P21" style:family="paragraph" style:parent-style-name="Text_20_body">
      <style:paragraph-properties fo:text-align="start" style:justify-single-word="false"/>
      <style:text-properties officeooo:paragraph-rsid="0022e9a4"/>
    </style:style>
    <style:style style:name="P22" style:family="paragraph" style:parent-style-name="Text_20_body">
      <style:text-properties officeooo:paragraph-rsid="0024e55b"/>
    </style:style>
    <style:style style:name="P23" style:family="paragraph" style:parent-style-name="Text_20_body">
      <style:text-properties officeooo:rsid="00212307" officeooo:paragraph-rsid="0024e55b"/>
    </style:style>
    <style:style style:name="P24" style:family="paragraph" style:parent-style-name="Text_20_body">
      <style:text-properties officeooo:rsid="00212307" officeooo:paragraph-rsid="0027d443"/>
    </style:style>
    <style:style style:name="P25" style:family="paragraph" style:parent-style-name="Text_20_body">
      <style:text-properties officeooo:rsid="00212307" officeooo:paragraph-rsid="002f5d6c"/>
    </style:style>
    <style:style style:name="P26" style:family="paragraph" style:parent-style-name="Text_20_body">
      <style:text-properties officeooo:paragraph-rsid="0025b381"/>
    </style:style>
    <style:style style:name="P27" style:family="paragraph" style:parent-style-name="Text_20_body">
      <style:text-properties officeooo:paragraph-rsid="002f793d"/>
    </style:style>
    <style:style style:name="P28" style:family="paragraph" style:parent-style-name="Text_20_body">
      <style:text-properties style:text-line-through-style="none" style:text-line-through-type="none" fo:font-size="14pt" style:font-size-asian="14pt" style:font-size-complex="14pt"/>
    </style:style>
    <style:style style:name="P29" style:family="paragraph" style:parent-style-name="Text_20_body">
      <style:text-properties officeooo:paragraph-rsid="0031dcab"/>
    </style:style>
    <style:style style:name="P30" style:family="paragraph" style:parent-style-name="Text_20_body">
      <style:text-properties officeooo:rsid="00332336" officeooo:paragraph-rsid="00332336"/>
    </style:style>
    <style:style style:name="P31" style:family="paragraph" style:parent-style-name="Standard">
      <style:text-properties officeooo:rsid="00179d18" officeooo:paragraph-rsid="00179d18"/>
    </style:style>
    <style:style style:name="P32" style:family="paragraph" style:parent-style-name="Standard">
      <style:text-properties style:text-underline-style="none" officeooo:rsid="00179d18" officeooo:paragraph-rsid="001eb9bf"/>
    </style:style>
    <style:style style:name="P33" style:family="paragraph" style:parent-style-name="Standard">
      <style:text-properties fo:color="#000000" style:text-underline-style="none" fo:font-weight="bold" officeooo:rsid="00179d18" officeooo:paragraph-rsid="00206801" style:font-weight-asian="bold" style:font-weight-complex="bold"/>
    </style:style>
    <style:style style:name="P34" style:family="paragraph" style:parent-style-name="Standard">
      <style:text-properties fo:color="#158466" style:font-name="Times New Roman" style:text-underline-style="none" officeooo:rsid="001836b5" officeooo:paragraph-rsid="001836b5" fo:background-color="#ffbf00"/>
    </style:style>
    <style:style style:name="P35" style:family="paragraph" style:parent-style-name="Standard">
      <style:text-properties fo:font-size="15pt" style:text-underline-style="none" officeooo:rsid="00179d18" officeooo:paragraph-rsid="00179d18" style:font-size-asian="15pt" style:font-size-complex="15pt"/>
    </style:style>
    <style:style style:name="P36" style:family="paragraph" style:parent-style-name="Text_20_body">
      <style:text-properties style:font-name="Times New Roman" fo:font-size="14pt" fo:font-weight="normal" officeooo:paragraph-rsid="001eb9bf" fo:background-color="transparent" style:font-size-asian="14pt" style:font-weight-asian="normal" style:font-size-complex="14pt" style:font-weight-complex="normal"/>
    </style:style>
    <style:style style:name="P37" style:family="paragraph" style:parent-style-name="Text_20_body">
      <style:text-properties style:font-name="Times New Roman" fo:font-size="14pt" fo:font-weight="normal" officeooo:rsid="001eb9bf" officeooo:paragraph-rsid="001eb9bf" fo:background-color="#ffff00" style:font-size-asian="14pt" style:font-weight-asian="normal" style:font-size-complex="14pt" style:font-weight-complex="normal"/>
    </style:style>
    <style:style style:name="P38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9" style:family="paragraph" style:parent-style-name="Text_20_body">
      <style:text-properties style:font-name="Times New Roman" fo:font-size="14pt" fo:font-weight="normal" officeooo:paragraph-rsid="0025b381" style:font-size-asian="14pt" style:font-weight-asian="normal" style:font-size-complex="14pt" style:font-weight-complex="normal"/>
    </style:style>
    <style:style style:name="P40" style:family="paragraph" style:parent-style-name="Text_20_body">
      <style:text-properties style:font-name="Times New Roman" fo:font-size="14pt" fo:font-weight="normal" officeooo:rsid="00206801" officeooo:paragraph-rsid="00239501" fo:background-color="#ff4000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4pt" style:text-underline-style="none" fo:font-weight="normal" officeooo:rsid="00212307" officeooo:paragraph-rsid="00212307" fo:background-color="transparent" style:font-size-asian="14pt" style:font-weight-asian="normal" style:font-size-complex="14pt" style:font-weight-complex="normal"/>
    </style:style>
    <style:style style:name="P42" style:family="paragraph" style:parent-style-name="Text_20_body">
      <style:text-properties style:font-name="Times New Roman" fo:font-size="14pt" officeooo:paragraph-rsid="0030fd4d" style:font-size-asian="14pt" style:font-size-complex="14pt"/>
    </style:style>
    <style:style style:name="P43" style:family="paragraph" style:parent-style-name="Text_20_body">
      <style:text-properties style:font-name="Times New Roman" fo:font-size="14pt" fo:font-weight="bold" officeooo:rsid="00332336" officeooo:paragraph-rsid="00332336" fo:background-color="#ffff00" style:font-size-asian="14pt" style:font-weight-asian="bold" style:font-size-complex="14pt" style:font-weight-complex="bold"/>
    </style:style>
    <style:style style:name="P44" style:family="paragraph" style:parent-style-name="Text_20_body">
      <style:text-properties style:font-name="Times New Roman" fo:font-size="15pt" fo:font-weight="normal" officeooo:rsid="001eb9bf" officeooo:paragraph-rsid="001eb9bf" fo:background-color="#ffff00" style:font-size-asian="15pt" style:font-weight-asian="normal" style:font-size-complex="15pt" style:font-weight-complex="normal"/>
    </style:style>
    <style:style style:name="P45" style:family="paragraph" style:parent-style-name="Text_20_body">
      <style:text-properties style:font-name="Times New Roman" fo:font-size="15pt" fo:font-weight="normal" officeooo:rsid="00212307" officeooo:paragraph-rsid="00212307" fo:background-color="#ffff00" style:font-size-asian="15pt" style:font-weight-asian="normal" style:font-size-complex="15pt" style:font-weight-complex="normal"/>
    </style:style>
    <style:style style:name="P46" style:family="paragraph" style:parent-style-name="Text_20_body">
      <style:text-properties style:font-name="Times New Roman" fo:font-size="15pt" fo:font-weight="normal" officeooo:rsid="00206801" officeooo:paragraph-rsid="00206801" fo:background-color="#ff4000" style:font-size-asian="15pt" style:font-weight-asian="normal" style:font-size-complex="15pt" style:font-weight-complex="normal"/>
    </style:style>
    <style:style style:name="P47" style:family="paragraph" style:parent-style-name="Text_20_body">
      <style:text-properties fo:color="#000000" style:font-name="Times New Roman" fo:font-size="14pt" style:text-underline-style="none" fo:font-weight="normal" officeooo:rsid="0019600b" officeooo:paragraph-rsid="0019600b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font-size="14pt" officeooo:rsid="00179d18" officeooo:paragraph-rsid="00179d18" style:font-size-asian="14pt" style:font-size-complex="14pt"/>
    </style:style>
    <style:style style:name="P49" style:family="paragraph" style:parent-style-name="Standard">
      <style:text-properties fo:font-size="14pt" style:text-underline-style="none" officeooo:rsid="00179d18" officeooo:paragraph-rsid="00179d18" style:font-size-asian="14pt" style:font-size-complex="14pt"/>
    </style:style>
    <style:style style:name="P50" style:family="paragraph" style:parent-style-name="Standard">
      <style:text-properties fo:font-size="14pt" style:text-underline-style="none" officeooo:rsid="00179d18" officeooo:paragraph-rsid="001eb9bf" style:font-size-asian="14pt" style:font-size-complex="14pt"/>
    </style:style>
    <style:style style:name="P51" style:family="paragraph" style:parent-style-name="Standard">
      <style:text-properties fo:color="#3faf46" fo:font-size="14pt" style:text-underline-style="none" officeooo:rsid="00179d18" officeooo:paragraph-rsid="00179d18" fo:background-color="transparent" style:font-size-asian="14pt" style:font-size-complex="14pt"/>
    </style:style>
    <style:style style:name="P52" style:family="paragraph" style:parent-style-name="Standard">
      <style:text-properties fo:color="#3faf46" fo:font-size="14pt" style:text-underline-style="solid" style:text-underline-width="auto" style:text-underline-color="font-color" officeooo:rsid="00179d18" officeooo:paragraph-rsid="00179d18" fo:background-color="transparent" style:font-size-asian="14pt" style:font-size-complex="14pt"/>
    </style:style>
    <style:style style:name="P53" style:family="paragraph" style:parent-style-name="Standard">
      <style:text-properties fo:color="#000000" fo:font-size="14pt" style:text-underline-style="none" officeooo:rsid="00179d18" officeooo:paragraph-rsid="00179d18" fo:background-color="transparent" style:font-size-asian="14pt" style:font-size-complex="14pt"/>
    </style:style>
    <style:style style:name="P54" style:family="paragraph" style:parent-style-name="Standard">
      <style:text-properties fo:color="#000000" fo:font-size="14pt" style:text-underline-style="none" fo:font-weight="bold" officeooo:rsid="00179d18" officeooo:paragraph-rsid="00206801" fo:background-color="transparent" style:font-size-asian="14pt" style:font-weight-asian="bold" style:font-size-complex="14pt" style:font-weight-complex="bold"/>
    </style:style>
    <style:style style:name="P55" style:family="paragraph" style:parent-style-name="Standard">
      <style:text-properties fo:color="#000000" style:font-name="Times New Roman" fo:font-size="14pt" style:text-underline-style="none" officeooo:rsid="001836b5" officeooo:paragraph-rsid="001836b5" fo:background-color="#ffff00" style:font-size-asian="14pt" style:font-size-complex="14pt"/>
    </style:style>
    <style:style style:name="P56" style:family="paragraph" style:parent-style-name="Standard">
      <style:text-properties fo:color="#000000" style:font-name="Times New Roman" fo:font-size="14pt" style:text-underline-style="none" officeooo:rsid="001836b5" officeooo:paragraph-rsid="001836b5" fo:background-color="transparent" style:font-size-asian="14pt" style:font-size-complex="14pt"/>
    </style:style>
    <style:style style:name="P57" style:family="paragraph" style:parent-style-name="Standard">
      <style:text-properties fo:color="#000000" style:font-name="Times New Roman" fo:font-size="14pt" style:text-underline-style="none" fo:font-weight="normal" officeooo:rsid="00179d18" officeooo:paragraph-rsid="00179d18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style:font-name="Times New Roman" fo:font-size="14pt" style:text-underline-style="none" fo:font-weight="normal" officeooo:rsid="0019600b" officeooo:paragraph-rsid="00179d18" fo:background-color="#ffff00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style:font-name="Times New Roman" fo:font-size="14pt" style:text-underline-style="none" fo:font-weight="normal" officeooo:rsid="0019600b" officeooo:paragraph-rsid="0019600b" fo:background-color="#ffff00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a933" style:font-name="Times New Roman" fo:font-size="14pt" style:text-underline-style="none" officeooo:rsid="00179d18" officeooo:paragraph-rsid="00179d18" fo:background-color="#ff8000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7d443" style:font-size-asian="14pt" style:font-size-complex="14pt"/>
    </style:style>
    <style:style style:name="T3" style:family="text">
      <style:text-properties fo:font-size="14pt" fo:background-color="transparent" loext:char-shading-value="0" style:font-size-asian="14pt" style:font-size-complex="14pt"/>
    </style:style>
    <style:style style:name="T4" style:family="text">
      <style:text-properties fo:font-size="14pt" officeooo:rsid="001a7726" fo:background-color="transparent" loext:char-shading-value="0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3faf46" fo:font-size="14pt" fo:background-color="transparent" loext:char-shading-value="0" style:font-size-asian="14pt" style:font-size-complex="14pt"/>
    </style:style>
    <style:style style:name="T8" style:family="text">
      <style:text-properties fo:color="#ff860d" fo:font-size="18pt" style:font-size-asian="18pt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0000" style:font-name="Times New Roman" fo:font-size="14pt" fo:font-weight="normal" officeooo:rsid="0019600b" fo:background-color="transparent" loext:char-shading-value="0" style:font-size-asian="14pt" style:font-weight-asian="normal" style:font-size-complex="14pt" style:font-weight-complex="normal"/>
    </style:style>
    <style:style style:name="T11" style:family="text">
      <style:text-properties fo:color="#000000" style:font-name="Times New Roman" fo:font-size="14pt" fo:font-weight="normal" officeooo:rsid="0027d443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color="#000000" style:font-name="Times New Roman" fo:font-size="14pt" fo:font-weight="normal" officeooo:rsid="002f5d6c" fo:background-color="transparent" loext:char-shading-value="0" style:font-size-asian="14pt" style:font-weight-asian="normal" style:font-size-complex="14pt" style:font-weight-complex="normal"/>
    </style:style>
    <style:style style:name="T13" style:family="text">
      <style:text-properties fo:color="#000000" style:font-name="Times New Roman" fo:font-size="14pt" fo:font-weight="normal" officeooo:rsid="002f793d" fo:background-color="transparent" loext:char-shading-value="0" style:font-size-asian="14pt" style:font-weight-asian="normal" style:font-size-complex="14pt" style:font-weight-complex="normal"/>
    </style:style>
    <style:style style:name="T14" style:family="text">
      <style:text-properties fo:color="#000000" style:font-name="Times New Roman" fo:font-size="14pt" officeooo:rsid="0027d443" fo:background-color="transparent" loext:char-shading-value="0" style:font-size-asian="14pt" style:font-size-complex="14pt"/>
    </style:style>
    <style:style style:name="T15" style:family="text">
      <style:text-properties fo:color="#000000" style:font-name="Times New Roman" fo:font-size="14pt" officeooo:rsid="002f793d" fo:background-color="transparent" loext:char-shading-value="0" style:font-size-asian="14pt" style:font-size-complex="14pt"/>
    </style:style>
    <style:style style:name="T16" style:family="text">
      <style:text-properties fo:color="#000000" style:font-name="Times New Roman" fo:font-size="14pt" fo:font-weight="bold" officeooo:rsid="002f5d6c" fo:background-color="#ffff00" loext:char-shading-value="0" style:font-size-asian="14pt" style:font-weight-asian="bold" style:font-size-complex="14pt" style:font-weight-complex="bold"/>
    </style:style>
    <style:style style:name="T17" style:family="text">
      <style:text-properties fo:color="#000000" style:font-name="Times New Roman" fo:font-size="14pt" fo:font-weight="bold" officeooo:rsid="0019600b" fo:background-color="transparent" loext:char-shading-value="0" style:font-size-asian="14pt" style:font-weight-asian="bold" style:font-size-complex="14pt" style:font-weight-complex="bold"/>
    </style:style>
    <style:style style:name="T18" style:family="text">
      <style:text-properties fo:color="#000000" style:font-name="Times New Roman" fo:font-size="14pt" fo:font-weight="bold" officeooo:rsid="0022e9a4" fo:background-color="transparent" loext:char-shading-value="0" style:font-size-asian="14pt" style:font-weight-asian="bold" style:font-size-complex="14pt" style:font-weight-complex="bold"/>
    </style:style>
    <style:style style:name="T19" style:family="text">
      <style:text-properties fo:color="#000000" style:font-name="Times New Roman" fo:font-size="14pt" fo:font-weight="bold" officeooo:rsid="002f793d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fo:color="#000000" style:font-name="Times New Roman" fo:font-weight="normal" officeooo:rsid="0019600b" fo:background-color="#ffff00" loext:char-shading-value="0" style:font-weight-asian="normal" style:font-weight-complex="normal"/>
    </style:style>
    <style:style style:name="T21" style:family="text">
      <style:text-properties fo:color="#000000" style:font-name="Times New Roman" fo:font-weight="normal" fo:background-color="transparent" loext:char-shading-value="0" style:font-weight-asian="normal" style:font-weight-complex="normal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Times New Roman" fo:font-size="14pt" fo:font-weight="bold" officeooo:rsid="0024e55b" style:font-size-asian="14pt" style:font-weight-asian="bold" style:font-size-complex="14pt" style:font-weight-complex="bold"/>
    </style:style>
    <style:style style:name="T25" style:family="text">
      <style:text-properties style:font-name="Times New Roman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26" style:family="text">
      <style:text-properties style:font-name="Times New Roman" fo:font-size="14pt" fo:font-weight="bold" officeooo:rsid="0022e9a4" fo:background-color="transparent" loext:char-shading-value="0" style:font-size-asian="14pt" style:font-weight-asian="bold" style:font-size-complex="14pt" style:font-weight-complex="bold"/>
    </style:style>
    <style:style style:name="T27" style:family="text">
      <style:text-properties style:font-name="Times New Roman" fo:font-size="14pt" fo:font-weight="bold" officeooo:rsid="00212307" fo:background-color="transparent" loext:char-shading-value="0" style:font-size-asian="14pt" style:font-weight-asian="bold" style:font-size-complex="14pt" style:font-weight-complex="bold"/>
    </style:style>
    <style:style style:name="T2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officeooo:rsid="001f486f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24e55b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font-weight="normal" officeooo:rsid="0030fd4d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31dcab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font-weight="normal" officeooo:rsid="001ea317" fo:background-color="transparent" loext:char-shading-value="0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font-weight="normal" officeooo:rsid="001f486f" fo:background-color="transparent" loext:char-shading-value="0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font-weight="normal" officeooo:rsid="00206801" fo:background-color="transparent" loext:char-shading-value="0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font-weight="normal" officeooo:rsid="00212307" fo:background-color="transparent" loext:char-shading-value="0" style:font-size-asian="14pt" style:font-weight-asian="normal" style:font-size-complex="14pt" style:font-weight-complex="normal"/>
    </style:style>
    <style:style style:name="T38" style:family="text">
      <style:text-properties style:font-name="Times New Roman" fo:font-size="14pt" fo:font-weight="normal" officeooo:rsid="0025b381" fo:background-color="transparent" loext:char-shading-value="0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font-style="normal" style:text-underline-style="none" fo:font-weight="bold" officeooo:rsid="0022e9a4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style:font-name="Times New Roman" fo:font-size="14pt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style:text-underline-style="none" fo:font-weight="normal" officeooo:rsid="00212307" fo:background-color="transparent" loext:char-shading-value="0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style:text-underline-style="none" fo:font-weight="normal" officeooo:rsid="00222070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style:text-underline-style="none" fo:font-weight="normal" officeooo:rsid="0022e9a4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style:text-underline-style="none" fo:font-weight="normal" officeooo:rsid="00234d51" style:font-size-asian="14pt" style:font-weight-asian="normal" style:font-size-complex="14pt" style:font-weight-complex="normal"/>
    </style:style>
    <style:style style:name="T46" style:family="text">
      <style:text-properties style:font-name="Times New Roman" fo:font-size="14pt" style:text-underline-style="none" fo:font-weight="normal" officeooo:rsid="00239501" style:font-size-asian="14pt" style:font-weight-asian="normal" style:font-size-complex="14pt" style:font-weight-complex="normal"/>
    </style:style>
    <style:style style:name="T47" style:family="text">
      <style:text-properties style:font-name="Times New Roman" fo:font-size="14pt" style:text-underline-style="none" fo:font-weight="normal" officeooo:rsid="0027d443" style:font-size-asian="14pt" style:font-weight-asian="normal" style:font-size-complex="14pt" style:font-weight-complex="normal"/>
    </style:style>
    <style:style style:name="T48" style:family="text">
      <style:text-properties style:font-name="Times New Roman" fo:font-size="14pt" style:text-underline-style="none" fo:font-weight="normal" officeooo:rsid="002bffb1" style:font-size-asian="14pt" style:font-weight-asian="normal" style:font-size-complex="14pt" style:font-weight-complex="normal"/>
    </style:style>
    <style:style style:name="T49" style:family="text">
      <style:text-properties style:font-name="Times New Roman" fo:font-size="14pt" style:text-underline-style="none" fo:font-weight="bold" officeooo:rsid="00212307" fo:background-color="transparent" loext:char-shading-value="0" style:font-size-asian="14pt" style:font-weight-asian="bold" style:font-size-complex="14pt" style:font-weight-complex="bold"/>
    </style:style>
    <style:style style:name="T50" style:family="text">
      <style:text-properties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T51" style:family="text">
      <style:text-properties style:font-name="Times New Roman" fo:font-size="14pt" style:text-underline-style="none" fo:font-weight="bold" officeooo:rsid="0022e9a4" style:font-size-asian="14pt" style:font-weight-asian="bold" style:font-size-complex="14pt" style:font-weight-complex="bold"/>
    </style:style>
    <style:style style:name="T52" style:family="text">
      <style:text-properties officeooo:rsid="001f486f"/>
    </style:style>
    <style:style style:name="T53" style:family="text">
      <style:text-properties officeooo:rsid="00222070"/>
    </style:style>
    <style:style style:name="T54" style:family="text">
      <style:text-properties officeooo:rsid="0022e9a4"/>
    </style:style>
    <style:style style:name="T55" style:family="text">
      <style:text-properties style:use-window-font-color="true" style:font-name="Times New Roman" fo:font-size="14pt" fo:font-weight="bold" officeooo:rsid="0024e55b" fo:background-color="transparent" loext:char-shading-value="0" style:font-size-asian="14pt" style:font-weight-asian="bold" style:font-size-complex="14pt" style:font-weight-complex="bold"/>
    </style:style>
    <style:style style:name="T56" style:family="text">
      <style:text-properties style:use-window-font-color="true" style:font-name="Times New Roman" fo:font-size="14pt" fo:font-weight="normal" officeooo:rsid="0024e55b" fo:background-color="transparent" loext:char-shading-value="0" style:font-size-asian="14pt" style:font-weight-asian="normal" style:font-size-complex="14pt" style:font-weight-complex="normal"/>
    </style:style>
    <style:style style:name="T57" style:family="text">
      <style:text-properties fo:color="#00a933" style:font-name="Times New Roman" fo:font-size="14pt" fo:font-weight="bold" officeooo:rsid="0027d443" fo:background-color="#ffbf00" loext:char-shading-value="0" style:font-size-asian="14pt" style:font-weight-asian="bold" style:font-size-complex="14pt" style:font-weight-complex="bold"/>
    </style:style>
    <style:style style:name="T58" style:family="text">
      <style:text-properties officeooo:rsid="0030fd4d"/>
    </style:style>
    <style:style style:name="T59" style:family="text">
      <style:text-properties officeooo:rsid="0031dcab"/>
    </style:style>
    <style:style style:name="T60" style:family="text">
      <style:text-properties fo:font-variant="normal" fo:text-transform="none" fo:color="#000000" style:font-name="Times New Roman" fo:font-size="14pt" fo:letter-spacing="normal" fo:font-style="normal" fo:font-weight="normal" officeooo:rsid="0031dcab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officeooo:rsid="0031dcab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63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64" style:family="text">
      <style:text-properties fo:font-variant="normal" fo:text-transform="none" fo:color="#000000" style:font-name="Times New Roman1" fo:font-size="14pt" fo:letter-spacing="normal" fo:font-style="normal" fo:font-weight="normal" officeooo:rsid="0031dc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6">Elma Handžić <text:s text:c="2"/></text:span><text:span text:style-name="T1"><text:s text:c="12"/></text:span><text:s text:c="70"/><text:span text:style-name="T6"><text:s text:c="7"/>23.11.2025.</text:span></text:p>
      <text:p text:style-name="P48"/>
      <text:p text:style-name="P48"/>
      <text:p text:style-name="P49"/>
      <text:p text:style-name="P50"><text:s text:c="36"/></text:p>
      <text:p text:style-name="P32"><text:span text:style-name="T1"><text:s text:c="41"/></text:span><text:span text:style-name="T9"><text:s text:c="2"/>Vježba</text:span><text:span text:style-name="T1"> </text:span><text:span text:style-name="T8">O</text:span><text:span text:style-name="T9">range</text:span><text:span text:style-name="T7">HRM</text:span></text:p>
      <text:p text:style-name="P51"/>
      <text:p text:style-name="P51"/>
      <text:p text:style-name="P51"/>
      <text:p text:style-name="P53"/>
      <text:p text:style-name="P54"><text:s text:c="7"/></text:p>
      <text:p text:style-name="P33"><text:span text:style-name="T3"><text:s text:c="52"/>Feature: </text:span><text:span text:style-name="T4">Admin</text:span></text:p>
      <text:p text:style-name="P60"/>
      <text:p text:style-name="P34"><text:span text:style-name="T1">User story</text:span><text:span text:style-name="T2"> 1</text:span></text:p>
      <text:p text:style-name="P55"/>
      <text:p text:style-name="P56">As an admin, I want to add, edit, delete, and search user accounts in the User Management section under Admin so that I can maintain accurate access control and ensure that employees have the correct roles and permissions. </text:p>
      <text:p text:style-name="P57"/>
      <text:p text:style-name="P57"/>
      <text:p text:style-name="P57"/>
      <text:p text:style-name="P35"><text:span text:style-name="T21"><text:s/></text:span><text:span text:style-name="T20">TEST CASE 1</text:span></text:p>
      <text:p text:style-name="P58"/>
      <text:p text:style-name="P6"><text:span text:style-name="Strong_20_Emphasis"><text:span text:style-name="T17">ID:</text:span></text:span><text:span text:style-name="T10"> ADM03<text:line-break/></text:span><text:span text:style-name="Strong_20_Emphasis"><text:span text:style-name="T17">Title</text:span></text:span><text:span text:style-name="Strong_20_Emphasis"><text:span text:style-name="T10">:</text:span></text:span><text:span text:style-name="T10"> Searching for an existing user in User Management.<text:line-break/></text:span><text:span text:style-name="Strong_20_Emphasis"><text:span text:style-name="T18">Steps:</text:span></text:span></text:p>
      <text:p text:style-name="P9"><text:span text:style-name="T52">1.</text:span>Log in to OrangeHRM as an Admin.</text:p>
      <text:p text:style-name="Text_20_body"><text:span text:style-name="T35">2.</text:span><text:span text:style-name="T33">Open </text:span><text:span text:style-name="Strong_20_Emphasis"><text:span text:style-name="T33">Admin</text:span></text:span><text:span text:style-name="T33"> tab from the left menu.</text:span></text:p>
      <text:p text:style-name="Text_20_body"><text:span text:style-name="T35">3.</text:span><text:span text:style-name="T33">Go to </text:span><text:span text:style-name="Strong_20_Emphasis"><text:span text:style-name="T33">User Management → Users</text:span></text:span><text:span text:style-name="T33">.</text:span></text:p>
      <text:p text:style-name="Text_20_body"><text:span text:style-name="T35">4.</text:span><text:span text:style-name="T33">In the </text:span><text:span text:style-name="Strong_20_Emphasis"><text:span text:style-name="T33">Username</text:span></text:span><text:span text:style-name="T33"> search field, enter an existing username (</text:span><text:span text:style-name="T34">e.g:</text:span><text:span text:style-name="Strong_20_Emphasis"><text:span text:style-name="T33">”</text:span></text:span><text:span text:style-name="Strong_20_Emphasis"><text:span text:style-name="T34">hindd”</text:span></text:span><text:span text:style-name="T33">).</text:span></text:p>
      <text:p text:style-name="Text_20_body"><text:span text:style-name="T35">5.</text:span><text:span text:style-name="T33">Click </text:span><text:span text:style-name="T35">s</text:span><text:span text:style-name="Strong_20_Emphasis"><text:span text:style-name="T33">earch</text:span></text:span><text:span text:style-name="T33">.</text:span></text:p>
      <text:p text:style-name="P9"><text:span text:style-name="T52">6.</text:span>Observe the results table.</text:p>
      <text:p text:style-name="P11"><text:span text:style-name="Strong_20_Emphasis"><text:span text:style-name="T39">Excpected test result</text:span></text:span><text:span text:style-name="Strong_20_Emphasis"><text:span text:style-name="T40">:</text:span></text:span><text:span text:style-name="T33"> </text:span><text:span text:style-name="T35">p</text:span><text:span text:style-name="T33">assed</text:span></text:p>
      <text:p text:style-name="P11"><text:span text:style-name="Strong_20_Emphasis"><text:span text:style-name="T26">Test priority</text:span></text:span><text:span text:style-name="Strong_20_Emphasis"> </text:span><text:span text:style-name="Strong_20_Emphasis"><text:span text:style-name="T33">:</text:span></text:span><text:span text:style-name="T33"> </text:span><text:span text:style-name="T35">m</text:span><text:span text:style-name="T33">edium</text:span></text:p>
      <text:p text:style-name="P36"/>
      <text:p text:style-name="P37"/>
      <text:p text:style-name="P37"/>
      <text:p text:style-name="P37"><text:soft-page-break/></text:p>
      <text:p text:style-name="P37"/>
      <text:p text:style-name="P44">TEST CASE 2</text:p>
      <text:p text:style-name="P12"><text:span text:style-name="Strong_20_Emphasis"><text:span text:style-name="T23">ID</text:span></text:span><text:span text:style-name="Strong_20_Emphasis"><text:span text:style-name="T28">:</text:span></text:span><text:span text:style-name="T28"> ADM04<text:line-break/></text:span><text:span text:style-name="Strong_20_Emphasis"><text:span text:style-name="T23">Title</text:span></text:span><text:span text:style-name="Strong_20_Emphasis"><text:span text:style-name="T28">:</text:span></text:span><text:span text:style-name="T28"> Changing user status from </text:span><text:span text:style-name="T29">e</text:span><text:span text:style-name="T28">nabled to </text:span><text:span text:style-name="T29">d</text:span><text:span text:style-name="T28">isabled<text:line-break/></text:span><text:span text:style-name="Strong_20_Emphasis"><text:span text:style-name="T23">Steps</text:span></text:span><text:span text:style-name="Strong_20_Emphasis"><text:span text:style-name="T28">:</text:span></text:span></text:p>
      <text:p text:style-name="Text_20_body"><text:span text:style-name="T29">1.</text:span><text:span text:style-name="T28">Log in to OrangeHRM as Admin.</text:span></text:p>
      <text:p text:style-name="Text_20_body"><text:span text:style-name="T29">2.</text:span><text:span text:style-name="T28">Open the </text:span><text:span text:style-name="Strong_20_Emphasis"><text:span text:style-name="T28">Admin</text:span></text:span><text:span text:style-name="T28"> tab from the left menu.</text:span></text:p>
      <text:p text:style-name="Text_20_body"><text:span text:style-name="T29">3.</text:span><text:span text:style-name="T28">Navigate to </text:span><text:span text:style-name="Strong_20_Emphasis"><text:span text:style-name="T28">User Management </text:span></text:span><text:span text:style-name="Strong_20_Emphasis"><text:span text:style-name="T29">then U</text:span></text:span><text:span text:style-name="Strong_20_Emphasis"><text:span text:style-name="T28">sers</text:span></text:span><text:span text:style-name="T28">.</text:span></text:p>
      <text:p text:style-name="P8"><text:span text:style-name="T52">4.</text:span>In the search field, enter a valid existing username (e.g., “<text:span text:style-name="T52">hindd</text:span>”).</text:p>
      <text:p text:style-name="Text_20_body"><text:span text:style-name="T29">5.</text:span><text:span text:style-name="T28">Click </text:span><text:span text:style-name="T29">s</text:span><text:span text:style-name="Strong_20_Emphasis"><text:span text:style-name="T28">earch</text:span></text:span><text:span text:style-name="T28">.</text:span></text:p>
      <text:p text:style-name="Text_20_body"><text:span text:style-name="T29">6.</text:span><text:span text:style-name="T28">In the results table, click the </text:span><text:span text:style-name="T29">e</text:span><text:span text:style-name="Strong_20_Emphasis"><text:span text:style-name="T28">dit</text:span></text:span><text:span text:style-name="T28"> (pencil) button for that user.</text:span></text:p>
      <text:p text:style-name="Text_20_body"><text:span text:style-name="T29">7.</text:span><text:span text:style-name="T28">In the </text:span><text:span text:style-name="T29">s</text:span><text:span text:style-name="Strong_20_Emphasis"><text:span text:style-name="T28">tatus</text:span></text:span><text:span text:style-name="T28"> dropdown, change the value from </text:span><text:span text:style-name="T29">e</text:span><text:span text:style-name="Strong_20_Emphasis"><text:span text:style-name="T28">nabled</text:span></text:span><text:span text:style-name="T28"> to </text:span><text:span text:style-name="T29">d</text:span><text:span text:style-name="Strong_20_Emphasis"><text:span text:style-name="T28">isabled</text:span></text:span><text:span text:style-name="T28">.</text:span></text:p>
      <text:p text:style-name="Text_20_body"><text:span text:style-name="T29">8.</text:span><text:span text:style-name="T28">Click </text:span><text:span text:style-name="T29">green s</text:span><text:span text:style-name="Strong_20_Emphasis"><text:span text:style-name="T28">ave </text:span></text:span><text:span text:style-name="Strong_20_Emphasis"><text:span text:style-name="T29">button</text:span></text:span><text:span text:style-name="T28">.</text:span></text:p>
      <text:p text:style-name="P8"><text:span text:style-name="T52">9.</text:span>Return to the <text:span text:style-name="T52">u</text:span>sers list and search for the same username again.</text:p>
      <text:p text:style-name="Text_20_body"><text:span text:style-name="T29">10.</text:span><text:span text:style-name="T28">Verify that the user now appears with </text:span><text:span text:style-name="T29">s</text:span><text:span text:style-name="Strong_20_Emphasis"><text:span text:style-name="T28">tatus </text:span></text:span><text:span text:style-name="Strong_20_Emphasis"><text:span text:style-name="T29">as d</text:span></text:span><text:span text:style-name="Strong_20_Emphasis"><text:span text:style-name="T28">isabled</text:span></text:span><text:span text:style-name="T28">.</text:span></text:p>
      <text:p text:style-name="Text_20_body"><text:span text:style-name="Strong_20_Emphasis"><text:span text:style-name="T28">Expected </text:span></text:span><text:span text:style-name="Strong_20_Emphasis"><text:span text:style-name="T29">t</text:span></text:span><text:span text:style-name="Strong_20_Emphasis"><text:span text:style-name="T28">est </text:span></text:span><text:span text:style-name="Strong_20_Emphasis"><text:span text:style-name="T29">r</text:span></text:span><text:span text:style-name="Strong_20_Emphasis"><text:span text:style-name="T28">esult:</text:span></text:span><text:span text:style-name="T28"> </text:span><text:span text:style-name="T29">p</text:span><text:span text:style-name="T28">assed<text:line-break/></text:span><text:span text:style-name="Strong_20_Emphasis"><text:span text:style-name="T28">Test </text:span></text:span><text:span text:style-name="Strong_20_Emphasis"><text:span text:style-name="T29">p</text:span></text:span><text:span text:style-name="Strong_20_Emphasis"><text:span text:style-name="T28">riority:</text:span></text:span><text:span text:style-name="T28"> </text:span><text:span text:style-name="T29">h</text:span><text:span text:style-name="T28">igh</text:span></text:p>
      <text:p text:style-name="P8"/>
      <text:p text:style-name="P8"/>
      <text:p text:style-name="P46">Bug report</text:p>
      <text:p text:style-name="P16"><text:span text:style-name="Strong_20_Emphasis"><text:span text:style-name="T25">Title</text:span></text:span><text:span text:style-name="Strong_20_Emphasis"><text:span text:style-name="T33">:</text:span></text:span><text:span text:style-name="T33"> Language partially switches to Chinese after clicking in the Admin section</text:span></text:p>
      <text:p text:style-name="P18"><text:span text:style-name="Strong_20_Emphasis"><text:span text:style-name="T25">Description</text:span></text:span><text:span text:style-name="Strong_20_Emphasis"><text:span text:style-name="T33">:</text:span></text:span><text:span text:style-name="T33"> When </text:span><text:span text:style-name="T36">c</text:span><text:span text:style-name="T33">licking</text:span><text:span text:style-name="T36">, </text:span><text:span text:style-name="T33">selecting options, </text:span><text:span text:style-name="T36">generally using application </text:span><text:span text:style-name="T33">in the Admin section, some interface elements switch </text:span><text:span text:style-name="T36">to</text:span><text:span text:style-name="T33"> Chinese language, while the rest remain in English. </text:span></text:p>
      <text:p text:style-name="P18"><text:span text:style-name="Strong_20_Emphasis"><text:span text:style-name="T25">Steps to Reproduce</text:span></text:span><text:span text:style-name="Strong_20_Emphasis"><text:span text:style-name="T33">:</text:span></text:span></text:p>
      <text:p text:style-name="Text_20_body"><text:span text:style-name="T33">-Open the website: </text:span><text:a xlink:type="simple" xlink:href="https://opensource-demo.orangehrmlive.com/" office:target-frame-name="_new" xlink:show="replace" text:style-name="Internet_20_link" text:visited-style-name="Visited_20_Internet_20_Link"><text:span text:style-name="T33">https://opensource-demo.orangehrmlive.com</text:span></text:a></text:p>
      <text:p text:style-name="P9">-Log in as Admin</text:p>
      <text:p text:style-name="Text_20_body"><text:span text:style-name="T33">-Click on the </text:span><text:span text:style-name="Strong_20_Emphasis"><text:span text:style-name="T33">Admin</text:span></text:span><text:span text:style-name="T33"> section in the left menu</text:span></text:p>
      <text:p text:style-name="Text_20_body"><text:span text:style-name="T33">-Perform a </text:span><text:span text:style-name="Strong_20_Emphasis"><text:span text:style-name="T33">long click</text:span></text:span><text:span text:style-name="T33"> or hold the mouse on options within the Admin menu</text:span></text:p>
      <text:p text:style-name="P9"><text:soft-page-break/>-Observe the labels and table text</text:p>
      <text:p text:style-name="Text_20_body"><text:span text:style-name="Strong_20_Emphasis"><text:span text:style-name="T25">Expected </text:span></text:span><text:span text:style-name="Strong_20_Emphasis"><text:span text:style-name="T26"><text:s/>r</text:span></text:span><text:span text:style-name="Strong_20_Emphasis"><text:span text:style-name="T25">esult</text:span></text:span><text:span text:style-name="Strong_20_Emphasis"><text:span text:style-name="T33">:</text:span></text:span><text:span text:style-name="T33"> All interface elements should <text:s/>remain in English with no unexpected language changes.</text:span></text:p>
      <text:p text:style-name="Text_20_body"><text:span text:style-name="Strong_20_Emphasis"><text:span text:style-name="T25">Actual Result:</text:span></text:span><text:span text:style-name="T33"> Part of the interface switches to Chinese, while the rest stays in English.</text:span></text:p>
      <text:p text:style-name="Text_20_body"><text:span text:style-name="Strong_20_Emphasis"><text:span text:style-name="T25">Severity</text:span></text:span><text:span text:style-name="Strong_20_Emphasis"><text:span text:style-name="T33">:</text:span></text:span><text:span text:style-name="T33"> </text:span><text:span text:style-name="T38">major</text:span></text:p>
      <text:p text:style-name="Text_20_body"><text:span text:style-name="Strong_20_Emphasis"><text:span text:style-name="T25">Priority</text:span></text:span><text:span text:style-name="Strong_20_Emphasis"><text:span text:style-name="T33">:</text:span></text:span><text:span text:style-name="T33"> </text:span><text:span text:style-name="T38">medium</text:span></text:p>
      <text:p text:style-name="Text_20_body"><text:span text:style-name="Strong_20_Emphasis"><text:span text:style-name="T25">Attachment</text:span></text:span><text:span text:style-name="Strong_20_Emphasis"><text:span text:style-name="T33">: </text:span></text:span><text:span text:style-name="Strong_20_Emphasis"><text:span text:style-name="T36">screenshot <text:s/></text:span></text:span></text:p>
      <text:p text:style-name="Text_20_body"><draw:frame draw:style-name="fr1" draw:name="Image1" text:anchor-type="paragraph" svg:x="-0.377cm" svg:y="0cm" svg:width="18.348cm" svg:height="8.317cm" draw:z-index="0"><draw:image xlink:href="Pictures/100002010000077600000362EA93AFFAF1FE15AC.png" xlink:type="simple" xlink:show="embed" xlink:actuate="onLoad" loext:mime-type="image/png"/></draw:frame><text:span text:style-name="Strong_20_Emphasis"><text:span text:style-name="T36"/></text:span></text:p>
      <text:p text:style-name="P37"/>
      <text:p text:style-name="P45">TEST CASE 3</text:p>
      <text:p text:style-name="P17"><text:span text:style-name="Strong_20_Emphasis"><text:span text:style-name="T25">ID</text:span></text:span><text:span text:style-name="Strong_20_Emphasis"><text:span text:style-name="T33">:</text:span></text:span><text:span text:style-name="T33"> ADM15 </text:span></text:p>
      <text:p text:style-name="P20"><text:span text:style-name="Strong_20_Emphasis"><text:span text:style-name="T49">Title</text:span></text:span><text:span text:style-name="Strong_20_Emphasis"><text:span text:style-name="T41">:</text:span></text:span><text:span text:style-name="T41"> Attempt to change a user’s username to an already existing username and verify validation message</text:span></text:p>
      <text:p text:style-name="P20"><text:span text:style-name="Strong_20_Emphasis"><text:span text:style-name="T50">Preconditions</text:span></text:span><text:span text:style-name="Strong_20_Emphasis"><text:span text:style-name="T42">:</text:span></text:span></text:p>
      <text:p text:style-name="P20"><text:span text:style-name="Strong_20_Emphasis"><text:span text:style-name="T42">-</text:span></text:span><text:span text:style-name="T42">Admin has valid login credentials.</text:span></text:p>
      <text:p text:style-name="P19"><text:span text:style-name="T42">-In the system already exist at least two different user account</text:span><text:span text:style-name="T43">s.</text:span></text:p>
      <text:p text:style-name="P20"><text:span text:style-name="T42">-Both users are visible under </text:span><text:span text:style-name="Strong_20_Emphasis"><text:span text:style-name="T42">Admin, User Managemen</text:span></text:span><text:span text:style-name="Strong_20_Emphasis"><text:span text:style-name="T43">t,</text:span></text:span><text:span text:style-name="Strong_20_Emphasis"><text:span text:style-name="T42"> Users.</text:span></text:span></text:p>
      <text:p text:style-name="P20"><text:span text:style-name="Strong_20_Emphasis"><text:span text:style-name="T50">Test data</text:span></text:span><text:span text:style-name="Strong_20_Emphasis"><text:span text:style-name="T42">:</text:span></text:span></text:p>
      <text:p text:style-name="P20"><text:span text:style-name="T42">-Username to edit: </text:span><text:span text:style-name="Source_20_Text"><text:span text:style-name="T45">username101</text:span></text:span></text:p>
      <text:p text:style-name="P20"><text:soft-page-break/><text:span text:style-name="T42">-New (duplicate) username to assign: </text:span><text:span text:style-name="Source_20_Text"><text:span text:style-name="T44">FMLName</text:span></text:span></text:p>
      <text:p text:style-name="P20"><text:span text:style-name="Strong_20_Emphasis"><text:span text:style-name="T50">Steps</text:span></text:span><text:span text:style-name="Strong_20_Emphasis"><text:span text:style-name="T42">:</text:span></text:span></text:p>
      <text:p text:style-name="P10"><text:span text:style-name="T53">1.</text:span>Log in to OrangeHRM as Admin.</text:p>
      <text:p text:style-name="P19"><text:span text:style-name="T43">2.</text:span><text:span text:style-name="T42">Open the </text:span><text:span text:style-name="Strong_20_Emphasis"><text:span text:style-name="T42">Admin</text:span></text:span><text:span text:style-name="T42"> tab from the left </text:span><text:span text:style-name="T43">s</text:span><text:span text:style-name="T42">ide menu.</text:span></text:p>
      <text:p text:style-name="P19"><text:span text:style-name="T43">3.</text:span><text:span text:style-name="T42">Navigate to </text:span><text:span text:style-name="Strong_20_Emphasis"><text:span text:style-name="T42">User Managemen</text:span></text:span><text:span text:style-name="Strong_20_Emphasis"><text:span text:style-name="T45">t,</text:span></text:span><text:span text:style-name="Strong_20_Emphasis"><text:span text:style-name="T42"> Users</text:span></text:span><text:span text:style-name="T42">.</text:span></text:p>
      <text:p text:style-name="P19"><text:span text:style-name="T43">4.</text:span><text:span text:style-name="T42">In the </text:span><text:span text:style-name="T43">u</text:span><text:span text:style-name="T42">sername search field enter </text:span><text:span text:style-name="Source_20_Text"><text:span text:style-name="T42">“</text:span></text:span><text:span text:style-name="Source_20_Text"><text:span text:style-name="T45">username101”</text:span></text:span><text:span text:style-name="T42">.</text:span></text:p>
      <text:p text:style-name="P19"><text:span text:style-name="T43">5.</text:span><text:span text:style-name="T42">Click </text:span><text:span text:style-name="T43">s</text:span><text:span text:style-name="Strong_20_Emphasis"><text:span text:style-name="T42">earch</text:span></text:span><text:span text:style-name="T42">.</text:span></text:p>
      <text:p text:style-name="P19"><text:span text:style-name="T43">6.</text:span><text:span text:style-name="T42">In the results table click the </text:span><text:span text:style-name="Strong_20_Emphasis"><text:span text:style-name="T42">edit (pencil)</text:span></text:span><text:span text:style-name="T42"> button for user </text:span><text:span text:style-name="Source_20_Text"><text:span text:style-name="T42">“</text:span></text:span><text:span text:style-name="Source_20_Text"><text:span text:style-name="T45">username101”</text:span></text:span><text:span text:style-name="T42">.</text:span></text:p>
      <text:p text:style-name="P10"><text:span text:style-name="T53">7.</text:span>In the Username field delete the current <text:span text:style-name="T54">username </text:span></text:p>
      <text:p text:style-name="P21"><text:span text:style-name="T43">8.</text:span><text:span text:style-name="T42">Enter a username that already exists in the system, e.g:</text:span><text:span text:style-name="Source_20_Text"><text:span text:style-name="T44">FMLName.</text:span></text:span></text:p>
      <text:p text:style-name="P19"><text:span text:style-name="T43">9.</text:span><text:span text:style-name="T42">Click the </text:span><text:span text:style-name="Strong_20_Emphasis"><text:span text:style-name="T42">green </text:span></text:span><text:span text:style-name="Strong_20_Emphasis"><text:span text:style-name="T43">s</text:span></text:span><text:span text:style-name="Strong_20_Emphasis"><text:span text:style-name="T42">ave</text:span></text:span><text:span text:style-name="T42"> button.</text:span></text:p>
      <text:p text:style-name="P10"><text:span text:style-name="T53">10.</text:span>Observe the page for validation errors.</text:p>
      <text:p text:style-name="P19"><text:span text:style-name="T43">11.</text:span><text:span text:style-name="T42">Return to the Users list and search for “</text:span><text:span text:style-name="T46">username101</text:span><text:span text:style-name="Source_20_Text"><text:span text:style-name="T42">”</text:span></text:span><text:span text:style-name="T42"> again.</text:span></text:p>
      <text:p text:style-name="P19"><text:span text:style-name="T43">12.</text:span><text:span text:style-name="T42">Verify that the user “</text:span><text:span text:style-name="T46">username101</text:span><text:span text:style-name="Source_20_Text"><text:span text:style-name="T42">”</text:span></text:span><text:span text:style-name="T42"> still exists with the original username (no changes applied).</text:span></text:p>
      <text:h text:style-name="P1" text:outline-level="3"><text:span text:style-name="Strong_20_Emphasis"><text:span text:style-name="T50">Expected </text:span></text:span><text:span text:style-name="Strong_20_Emphasis"><text:span text:style-name="T51">test </text:span></text:span><text:span text:style-name="Strong_20_Emphasis"><text:span text:style-name="T50">result</text:span></text:span><text:span text:style-name="Strong_20_Emphasis"><text:span text:style-name="T42">:</text:span></text:span></text:h>
      <text:p text:style-name="P19"><text:span text:style-name="T42">System displays a clear validation error message indicating that the username already exists (e.g., </text:span><text:span text:style-name="Strong_20_Emphasis"><text:span text:style-name="T42">“Already exists”</text:span></text:span><text:span text:style-name="T42">).</text:span></text:p>
      <text:p text:style-name="P10">User cannot be saved with a duplicate username.</text:p>
      <text:p text:style-name="P19"><text:span text:style-name="T42">No changes are made to the original user (“</text:span><text:span text:style-name="Source_20_Text"><text:span text:style-name="T47">username101”</text:span></text:span><text:span text:style-name="T42">).</text:span></text:p>
      <text:h text:style-name="P2" text:outline-level="3"><text:span text:style-name="Strong_20_Emphasis"><text:span text:style-name="T50">Actual result</text:span></text:span><text:span text:style-name="Strong_20_Emphasis"><text:span text:style-name="T42">:A red pop-up error message appears saying "Error: Record Not Found", and the system does not allow changing the username to one that already exists. No updates are saved. </text:span></text:span></text:h>
      <text:h text:style-name="P2" text:outline-level="3"><text:span text:style-name="Strong_20_Emphasis"><text:span text:style-name="T50">Status</text:span></text:span><text:span text:style-name="Strong_20_Emphasis"><text:span text:style-name="T42">:</text:span></text:span><text:span text:style-name="T42"> Pass </text:span></text:h>
      <text:h text:style-name="P1" text:outline-level="3"><text:span text:style-name="Strong_20_Emphasis"><text:span text:style-name="T50">Priority</text:span></text:span><text:span text:style-name="Strong_20_Emphasis"><text:span text:style-name="T42">:</text:span></text:span><text:span text:style-name="T42"> </text:span><text:span text:style-name="T48">Medium </text:span></text:h>
      <text:p text:style-name="P41"/>
      <text:p text:style-name="P45"/>
      <text:p text:style-name="P40"/>
      <text:p text:style-name="P40"/>
      <text:p text:style-name="P40"><text:soft-page-break/>Bug report</text:p>
      <text:p text:style-name="P22"><text:span text:style-name="T55">Title:</text:span><text:span text:style-name="T56"> </text:span><text:span text:style-name="T28">System shows “Error: Record Not Found” and prevents updating username even when the new username is unique.</text:span></text:p>
      <text:p text:style-name="P22"><text:span text:style-name="T24">Description: </text:span><text:span text:style-name="T22">When attempting to edit an existing user account and change the username, the system displays a red error pop-up </text:span><text:span text:style-name="Strong_20_Emphasis"><text:span text:style-name="T22">“</text:span></text:span><text:span text:style-name="Strong_20_Emphasis"><text:span text:style-name="T28">Error: Record Not Found”</text:span></text:span><text:span text:style-name="T28"> and does not allow saving the changes.<text:line-break/>The issue occurs </text:span><text:span text:style-name="Strong_20_Emphasis"><text:span text:style-name="T28">even when the new username does not exist in the system</text:span></text:span><text:span text:style-name="T28"> (e.g., </text:span><text:span text:style-name="Source_20_Text"><text:span text:style-name="T30">elma73</text:span></text:span><text:span text:style-name="T28">), meaning the system fails to update valid, unique usernames.</text:span></text:p>
      <text:p text:style-name="Text_20_body"><text:span text:style-name="T28">The bug occurs both when entering an </text:span><text:span text:style-name="Strong_20_Emphasis"><text:span text:style-name="T28">already existing username</text:span></text:span><text:span text:style-name="T28"> and when entering a </text:span><text:span text:style-name="Strong_20_Emphasis"><text:span text:style-name="T28">new unique username</text:span></text:span><text:span text:style-name="T28">, meaning validation is failing incorrectly.</text:span></text:p>
      <text:p text:style-name="P8">This blocks one of the core admin functions: editing user accounts.</text:p>
      <text:p text:style-name="P22"><text:span text:style-name="Strong_20_Emphasis"><text:span text:style-name="T27">Steps to Reproduce: </text:span></text:span></text:p>
      <text:p text:style-name="P22"><text:span text:style-name="Strong_20_Emphasis"><text:span text:style-name="T37">-</text:span></text:span><text:span text:style-name="Strong_20_Emphasis"><text:span text:style-name="T33">Log in to OrangeHRM as Admin.</text:span></text:span></text:p>
      <text:p text:style-name="Text_20_body"><text:span text:style-name="T28">-Open </text:span><text:span text:style-name="Strong_20_Emphasis"><text:span text:style-name="T28">Admin</text:span></text:span><text:span text:style-name="T28"> tab from the left menu.</text:span></text:p>
      <text:p text:style-name="Text_20_body"><text:span text:style-name="T28">-Navigate to </text:span><text:span text:style-name="Strong_20_Emphasis"><text:span text:style-name="T28">User Management </text:span></text:span><text:span text:style-name="Strong_20_Emphasis"><text:span text:style-name="T30">then</text:span></text:span><text:span text:style-name="Strong_20_Emphasis"><text:span text:style-name="T28"> Users</text:span></text:span><text:span text:style-name="T28">.</text:span></text:p>
      <text:p text:style-name="Text_20_body"><text:span text:style-name="T28">-In the Username search field enter an existing user (e.g., </text:span><text:span text:style-name="Source_20_Text"><text:span text:style-name="T28">hindd</text:span></text:span><text:span text:style-name="T28">).</text:span></text:p>
      <text:p text:style-name="Text_20_body"><text:span text:style-name="T28">-Click </text:span><text:span text:style-name="Strong_20_Emphasis"><text:span text:style-name="T28">Search</text:span></text:span><text:span text:style-name="T28">.</text:span></text:p>
      <text:p text:style-name="Text_20_body"><text:span text:style-name="T28">-In the results table click the </text:span><text:span text:style-name="Strong_20_Emphasis"><text:span text:style-name="T28">edit (pencil)</text:span></text:span><text:span text:style-name="T28"> button.</text:span></text:p>
      <text:p text:style-name="P8">-In the Username field delete the current username.</text:p>
      <text:p text:style-name="Text_20_body"><text:span text:style-name="T28">-Enter a </text:span><text:span text:style-name="Strong_20_Emphasis"><text:span text:style-name="T28">new valid and unique username</text:span></text:span><text:span text:style-name="T28">, e.g., </text:span><text:span text:style-name="Source_20_Text"><text:span text:style-name="T28">elma73</text:span></text:span><text:span text:style-name="T28">.</text:span></text:p>
      <text:p text:style-name="Text_20_body"><text:span text:style-name="T28">-Click the </text:span><text:span text:style-name="Strong_20_Emphasis"><text:span text:style-name="T28">green Save</text:span></text:span><text:span text:style-name="T28"> button.</text:span></text:p>
      <text:p text:style-name="P26"><text:span text:style-name="Strong_20_Emphasis"><text:span text:style-name="T25">Expected</text:span></text:span><text:span text:style-name="Strong_20_Emphasis"><text:span text:style-name="T26"> r</text:span></text:span><text:span text:style-name="Strong_20_Emphasis"><text:span text:style-name="T25">esult: </text:span></text:span><text:span text:style-name="Strong_20_Emphasis"><text:span text:style-name="T33">System should allow saving a new username as long as it is unique and valid. </text:span></text:span><text:span text:style-name="T28">A success message should appear. User should be updated with the new username (e.g., </text:span><text:span text:style-name="Source_20_Text"><text:span text:style-name="T28">elma73</text:span></text:span><text:span text:style-name="T28">).</text:span></text:p>
      <text:p text:style-name="P13"><text:span text:style-name="T22">Severity: </text:span><text:span text:style-name="T28">minor</text:span></text:p>
      <text:p text:style-name="P14"><text:span text:style-name="T22">Priority: </text:span><text:span text:style-name="T28">medium</text:span></text:p>
      <text:p text:style-name="P14"><text:span text:style-name="T22">Attachment: </text:span><text:span text:style-name="T28">screenshot</text:span></text:p>
      <text:p text:style-name="P39"/>
      <text:p text:style-name="P26"><text:span text:style-name="Strong_20_Emphasis"><text:span text:style-name="T33"/></text:span></text:p>
      <text:p text:style-name="P8"/>
      <text:p text:style-name="P23"><draw:frame draw:style-name="fr1" draw:name="Image2" text:anchor-type="paragraph" svg:x="-0.612cm" svg:y="-0.748cm" svg:width="18.459cm" svg:height="10.5cm" draw:z-index="1"><draw:image xlink:href="Pictures/10000201000007710000036D9EFB8B7AD95AAEBB.png" xlink:type="simple" xlink:show="embed" xlink:actuate="onLoad" loext:mime-type="image/png"/></draw:frame><text:soft-page-break/><text:span text:style-name="Strong_20_Emphasis"><text:span text:style-name="T25"/></text:span></text:p>
      <text:p text:style-name="P23"><text:span text:style-name="Strong_20_Emphasis"><text:span text:style-name="T25"/></text:span></text:p>
      <text:p text:style-name="P24"><text:span text:style-name="Strong_20_Emphasis"><text:span text:style-name="T57">User story 2</text:span></text:span></text:p>
      <text:p text:style-name="P24"><text:span text:style-name="Strong_20_Emphasis"><text:span text:style-name="T11"/></text:span></text:p>
      <text:p text:style-name="P24"><text:span text:style-name="Strong_20_Emphasis"><text:span text:style-name="T11">As an admin, I want to manage all job settings in the Job sectio</text:span></text:span><text:span text:style-name="Strong_20_Emphasis"><text:span text:style-name="T12">n:</text:span></text:span><text:span text:style-name="Strong_20_Emphasis"><text:span text:style-name="T11"> job titles, pay grades, employment statuses, job categories, and work shifts — so that I can maintain accurate organizational structure, define compensation levels, </text:span></text:span><text:span text:style-name="Strong_20_Emphasis"><text:span text:style-name="T12">and know</text:span></text:span><text:span text:style-name="Strong_20_Emphasis"><text:span text:style-name="T11"> that employee records are classified correctly across the system. </text:span></text:span></text:p>
      <text:p text:style-name="P24"><text:span text:style-name="Strong_20_Emphasis"><text:span text:style-name="T11"/></text:span></text:p>
      <text:p text:style-name="P25"><text:span text:style-name="Strong_20_Emphasis"><text:span text:style-name="T16">TEST CASE 4</text:span></text:span></text:p>
      <text:p text:style-name="P24"><text:span text:style-name="Strong_20_Emphasis"><text:span text:style-name="T14">ID:</text:span></text:span><text:span text:style-name="Strong_20_Emphasis"><text:span text:style-name="T11"> JOB01 </text:span></text:span></text:p>
      <text:p text:style-name="P27"><text:span text:style-name="Strong_20_Emphasis"><text:span text:style-name="T19">Title: </text:span></text:span><text:span text:style-name="Strong_20_Emphasis"><text:span text:style-name="T13">Adding a job specification document to a job title</text:span></text:span></text:p>
      <text:h text:style-name="P4" text:outline-level="3"><text:span text:style-name="Strong_20_Emphasis"><text:span text:style-name="T15">Preconditions:</text:span></text:span></text:h>
      <text:p text:style-name="P7">-Admin has valid login credentials.</text:p>
      <text:p text:style-name="P28">Admin is on the OrangeHRM dashboard, <text:span text:style-name="T58">on Admin, under Job-Job Titles</text:span></text:p>
      <text:p text:style-name="P7">-A valid document (e.g., PDF, DOCX) is available on the local device for upload.</text:p>
      <text:h text:style-name="P4" text:outline-level="3"><text:soft-page-break/><text:span text:style-name="Strong_20_Emphasis"><text:span text:style-name="T13"/></text:span></text:h>
      <text:h text:style-name="P4" text:outline-level="3"><text:span text:style-name="Strong_20_Emphasis"><text:span text:style-name="T15">Test data:</text:span></text:span></text:h>
      <text:p text:style-name="P42">Job Title: Account Assistant</text:p>
      <text:p text:style-name="P42">Job Specification File:”file-example_PDF_1MB” or any supported file type</text:p>
      <text:h text:style-name="P5" text:outline-level="3"><text:span text:style-name="Strong_20_Emphasis"><text:span text:style-name="T23">Steps:</text:span></text:span></text:h>
      <text:p text:style-name="P8"><text:span text:style-name="T58">1.</text:span>Log in to OrangeHRM as Admin.</text:p>
      <text:p text:style-name="Text_20_body"><text:span text:style-name="T31">2.</text:span><text:span text:style-name="T28">Open the </text:span><text:span text:style-name="Strong_20_Emphasis"><text:span text:style-name="T28">Admin</text:span></text:span><text:span text:style-name="T28"> tab from the left menu.</text:span></text:p>
      <text:p text:style-name="Text_20_body"><text:span text:style-name="T31">3.</text:span><text:span text:style-name="T28">Navigate to </text:span><text:span text:style-name="Strong_20_Emphasis"><text:span text:style-name="T28">Job </text:span></text:span><text:span text:style-name="Strong_20_Emphasis"><text:span text:style-name="T31">then </text:span></text:span><text:span text:style-name="Strong_20_Emphasis"><text:span text:style-name="T28">Job Titles</text:span></text:span><text:span text:style-name="T28">.</text:span></text:p>
      <text:p text:style-name="Text_20_body"><text:span text:style-name="T32">4.</text:span><text:span text:style-name="T28">In the job titles list, locate </text:span><text:span text:style-name="Strong_20_Emphasis"><text:span text:style-name="T28">Account Assistant</text:span></text:span><text:span text:style-name="T28">.</text:span></text:p>
      <text:p text:style-name="Text_20_body"><text:span text:style-name="T32">5.</text:span><text:span text:style-name="T28">Click the </text:span><text:span text:style-name="Strong_20_Emphasis"><text:span text:style-name="T28">edit (pencil)</text:span></text:span><text:span text:style-name="T28"> button next to </text:span><text:span text:style-name="Strong_20_Emphasis"><text:span text:style-name="T28">Account Assistant</text:span></text:span><text:span text:style-name="T28">.</text:span></text:p>
      <text:p text:style-name="Text_20_body"><text:span text:style-name="T32">6.</text:span><text:span text:style-name="T28">In the </text:span><text:span text:style-name="Strong_20_Emphasis"><text:span text:style-name="T28">Job Specification</text:span></text:span><text:span text:style-name="T28"> section, click </text:span><text:span text:style-name="Strong_20_Emphasis"><text:span text:style-name="T28">Browse</text:span></text:span><text:span text:style-name="T28"> (Choose File).</text:span></text:p>
      <text:p text:style-name="P29"><text:span text:style-name="T32">7.</text:span><text:span text:style-name="T28">Select a valid document from your computer (“file-example_PDF_1MB”).</text:span></text:p>
      <text:p text:style-name="P8"><text:span text:style-name="T59">8.</text:span>Verify that the file name appears next to the upload field.</text:p>
      <text:p text:style-name="Text_20_body"><text:span text:style-name="T32">9.</text:span><text:span text:style-name="T28">Click the </text:span><text:span text:style-name="Strong_20_Emphasis"><text:span text:style-name="T28">Save</text:span></text:span><text:span text:style-name="T28"> button.</text:span></text:p>
      <text:p text:style-name="Text_20_body"><text:span text:style-name="T32">10.</text:span><text:span text:style-name="T28">Return to the Job Titles list and search for </text:span><text:span text:style-name="Strong_20_Emphasis"><text:span text:style-name="T28">Account Assistant</text:span></text:span><text:span text:style-name="T28"> again.</text:span></text:p>
      <text:p text:style-name="Text_20_body"><text:span text:style-name="T32">11.</text:span><text:span text:style-name="T28">Open the job title using the </text:span><text:span text:style-name="Strong_20_Emphasis"><text:span text:style-name="T28">edit (pencil)</text:span></text:span><text:span text:style-name="T28"> button.</text:span></text:p>
      <text:p text:style-name="Text_20_body"><text:span text:style-name="T32">12.</text:span><text:span text:style-name="T28">Verify that the uploaded document is visible under </text:span><text:span text:style-name="Strong_20_Emphasis"><text:span text:style-name="T28">Job Specification</text:span></text:span><text:span text:style-name="T28">, with </text:span><text:span text:style-name="T32">a icon for d</text:span><text:span text:style-name="Strong_20_Emphasis"><text:span text:style-name="T28">ownload</text:span></text:span><text:span text:style-name="T28"> option </text:span><text:span text:style-name="T32">and 3 options for: </text:span><text:span text:style-name="T60">Keep Current,</text:span><text:span text:style-name="T63">Delete Current </text:span><text:span text:style-name="T64">and </text:span><text:span text:style-name="T63">Replace Current. </text:span></text:p>
      <text:h text:style-name="P3" text:outline-level="3"><text:span text:style-name="Strong_20_Emphasis"><text:span text:style-name="T61">Expected test result: </text:span></text:span></text:h>
      <text:h text:style-name="P3" text:outline-level="3"><text:span text:style-name="Strong_20_Emphasis"><text:span text:style-name="T62">System successfully uploads and attaches the job specification document. </text:span></text:span><text:span text:style-name="T28">Changes are saved without errors. The uploaded file appears correctly under Job Specification.</text:span></text:h>
      <text:p text:style-name="Text_20_body"><text:span text:style-name="T28">A Download icon/option confirms the file is stored. </text:span><text:span text:style-name="T5">A green pop-up notification appears in the bottom-left corner displaying </text:span><text:span text:style-name="Strong_20_Emphasis"><text:span text:style-name="T5">“Success! Successfully updated”.</text:span></text:span></text:p>
      <text:p text:style-name="P30"><text:span text:style-name="T23">Status</text:span><text:span text:style-name="T28">: passed</text:span></text:p>
      <text:p text:style-name="P15"><text:span text:style-name="T22">Priority: </text:span><text:span text:style-name="T28">medium </text:span></text:p>
      <text:p text:style-name="P8"/>
      <text:p text:style-name="P43"/>
      <text:p text:style-name="P43"/>
      <text:p text:style-name="P43"><text:soft-page-break/></text:p>
      <text:p text:style-name="P43"/>
      <text:p text:style-name="P27"><text:span text:style-name="Strong_20_Emphasis"><text:span text:style-name="T13"/></text:span></text:p>
      <text:p text:style-name="P24"><text:span text:style-name="Strong_20_Emphasis"><text:span text:style-name="T57"/></text:span></text:p>
      <text:p text:style-name="P58"/>
      <text:p text:style-name="P59"/>
      <text:p text:style-name="P47"><text:line-break/></text:p>
      <text:p text:style-name="P59"/>
      <text:p text:style-name="P57"/>
      <text:p text:style-name="P51"/>
      <text:p text:style-name="P52"/>
      <text:p text:style-name="P48"/>
      <text:p text:style-name="P48"/>
      <text:p text:style-name="P48"/>
      <text:p text:style-name="P48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s" fo:country="B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s" fo:country="B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23T12:32:14.566000000</meta:creation-date>
    <dc:date>2026-04-25T14:46:42.245000000</dc:date>
    <meta:editing-duration>PT32M9S</meta:editing-duration>
    <meta:editing-cycles>5</meta:editing-cycles>
    <meta:generator>Neat_Office/6.2.8.2$Windows_x86 LibreOffice_project/</meta:generator>
    <meta:document-statistic meta:table-count="0" meta:image-count="2" meta:object-count="0" meta:page-count="8" meta:paragraph-count="124" meta:word-count="1038" meta:character-count="6837" meta:non-whitespace-character-count="5671"/>
  </office:meta>
</office:document-meta>
</file>